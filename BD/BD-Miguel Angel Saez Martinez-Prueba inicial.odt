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 fo:padding-left="0.141cm" fo:padding-right="0.141cm" fo:padding-top="0.035cm" fo:padding-bottom="0.035cm" fo:border="0.51pt solid #000000" style:shadow="none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3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55fa8" officeooo:paragraph-rsid="00155fa8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55fa8" officeooo:paragraph-rsid="00155fa8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66185" officeooo:paragraph-rsid="00166185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66185" officeooo:paragraph-rsid="00166185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Standard">
      <style:paragraph-properties fo:margin-left="1.905cm" fo:margin-top="0cm" fo:margin-bottom="0cm" style:contextual-spacing="false" fo:line-height="100%" fo:text-indent="0cm" style:auto-text-indent="false"/>
    </style:style>
    <style:style style:name="P12" style:family="paragraph" style:parent-style-name="Standard">
      <style:paragraph-properties fo:margin-left="1.905cm" fo:margin-top="0cm" fo:margin-bottom="0cm" style:contextual-spacing="false" fo:line-height="100%" fo:text-indent="0cm" style:auto-text-indent="false"/>
      <style:text-properties fo:font-style="italic" officeooo:rsid="00166185" officeooo:paragraph-rsid="00166185" style:font-style-asian="italic"/>
    </style:style>
    <style:style style:name="P13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fo:font-style="italic" officeooo:rsid="00166185" officeooo:paragraph-rsid="00166185" style:font-style-asian="italic"/>
    </style:style>
    <style:style style:name="P14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fo:font-style="normal" officeooo:rsid="00166185" officeooo:paragraph-rsid="00166185" style:font-style-asian="normal" style:font-style-complex="normal"/>
    </style:style>
    <style:style style:name="P15" style:family="paragraph" style:parent-style-name="Standard">
      <style:paragraph-properties fo:margin-left="1.905cm" fo:margin-top="0cm" fo:margin-bottom="0cm" style:contextual-spacing="false" fo:line-height="100%" fo:text-indent="0cm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1.905cm" fo:margin-top="0cm" fo:margin-bottom="0cm" style:contextual-spacing="false" fo:line-height="100%" fo:text-indent="0cm" style:auto-text-indent="false"/>
      <style:text-properties fo:font-style="normal" officeooo:rsid="00166185" officeooo:paragraph-rsid="00166185" style:font-style-asian="normal" style:font-style-complex="normal"/>
    </style:style>
    <style:style style:name="P17" style:family="paragraph" style:parent-style-name="Standard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18" style:family="paragraph" style:parent-style-name="Standard">
      <style:paragraph-properties fo:margin-left="1.27cm" fo:margin-top="0cm" fo:margin-bottom="0cm" style:contextual-spacing="false" fo:line-height="100%" fo:text-indent="0cm" style:auto-text-indent="false"/>
      <style:text-properties officeooo:rsid="00166185" officeooo:paragraph-rsid="00166185"/>
    </style:style>
    <style:style style:name="P19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rsid="00166185" officeooo:paragraph-rsid="00166185"/>
    </style:style>
    <style:style style:name="P21" style:family="paragraph" style:parent-style-name="Standard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Standard">
      <loext:graphic-properties draw:fill="none" draw:fill-color="#ffffff"/>
      <style:paragraph-properties fo:margin-left="2.54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officeooo:rsid="00166185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italic" style:text-underline-style="none" fo:font-weight="normal" fo:background-color="transparent" loext:char-shading-value="0" style:font-name-asian="Calibri1" style:font-size-asian="11pt" style:font-style-asian="italic" style:font-weight-asian="normal" style:font-name-complex="Calibri1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UEBA INICIAL DE CONOCIMIENTOS</text:span><text:span text:style-name="T1"/></text:p>
      <text:p text:style-name="P2" loext:marker-style-name="T1"><text:span text:style-name="T2">BASES DE DATOS</text:span><text:span text:style-name="T1"> - 1DAW</text:span></text:p>
      <text:p text:style-name="Standard"/>
      <text:list text:style-name="WWNum1">
        <text:list-item>
          <text:p text:style-name="P3"><text:span text:style-name="T3">¿Qué es una base de datos? ¿y un SGBD? Pon ejemplos de SGBD.</text:span></text:p>
        </text:list-item>
      </text:list>
      <text:p text:style-name="P4" loext:marker-style-name="T3">Una base de datos es un sitio en el que se guardan muchos datos de manera en la que se puedan buscar de manera comoda,esto se hace mediante una aplicación o algo del estilo.Ni idea de lo otro.</text:p>
      <text:list text:continue-numbering="true" text:style-name="WWNum1">
        <text:list-item>
          <text:p text:style-name="P3"><text:span text:style-name="T3">¿Qué es el diseño lógico de bases de datos?</text:span></text:p>
        </text:list-item>
      </text:list>
      <text:p text:style-name="P5" loext:marker-style-name="T3">El diseño logico de base de datos es pensar para poder adaptar la base de datos al problema que tienes y a las necesidades que tienes,para esto tienes que diseñar bien la base de datos antes de empezar a hacerla.</text:p>
      <text:list text:continue-numbering="true" text:style-name="WWNum1">
        <text:list-item>
          <text:p text:style-name="P3"><text:span text:style-name="T3">¿Qué es una clave primaria en base de datos? ¿Para qué sirve?</text:span></text:p>
        </text:list-item>
      </text:list>
      <text:p text:style-name="P5" loext:marker-style-name="T3">Una clave primaria es un numero unico que hay en cada base de datos,suele ser un ID o DNI. Sirve para identificar cada <text:span text:style-name="T4">entrada de la base de datos y que sea unica.</text:span></text:p>
      <text:list text:continue-numbering="true" text:style-name="WWNum1">
        <text:list-item>
          <text:p text:style-name="P3"><text:span text:style-name="T3">¿Qué es una clave ajena en base de datos? ¿Para qué sirve?</text:span></text:p>
        </text:list-item>
      </text:list>
      <text:p text:style-name="P6" loext:marker-style-name="T3">Una clave ajena es una clave que une una tabla con otra y asi hace que se relacionen.</text:p>
      <text:list text:continue-numbering="true" text:style-name="WWNum1">
        <text:list-item>
          <text:p text:style-name="P3"><text:span text:style-name="T3">¿Para qué sirve ON DELETE en una clave ajena ?</text:span></text:p>
        </text:list-item>
      </text:list>
      <text:p text:style-name="P7" loext:marker-style-name="T3">Es para borrar la clave y asi que no se relacione con otra tabla.</text:p>
      <text:list text:continue-numbering="true" text:style-name="WWNum1">
        <text:list-item>
          <text:p text:style-name="P3"><text:span text:style-name="T3">¿Qué diferencia hay entre el diagrama E/R y el diagrama relacional? ¿Se puede pasar de uno a otro?</text:span></text:p>
        </text:list-item>
      </text:list>
      <text:p text:style-name="P7" loext:marker-style-name="T3">No lo se.</text:p>
      <text:list text:continue-numbering="true" text:style-name="WWNum1">
        <text:list-item>
          <text:p text:style-name="P3"><text:span text:style-name="T3">¿Qué es la normalización de una base de datos?</text:span></text:p>
        </text:list-item>
      </text:list>
      <text:p text:style-name="P7" loext:marker-style-name="T3">No lo se.</text:p>
      <text:list text:continue-numbering="true" text:style-name="WWNum1">
        <text:list-item>
          <text:p text:style-name="P3"><text:span text:style-name="T3">¿Qué es el diseño físico de bases de datos?</text:span></text:p>
        </text:list-item>
      </text:list>
      <text:p text:style-name="P7" loext:marker-style-name="T3">Supongo que el diseño que se realiza antes de empezar la base de datos,pero ni idea.</text:p>
      <text:list text:continue-numbering="true" text:style-name="WWNum1">
        <text:list-item>
          <text:p text:style-name="P3"><text:span text:style-name="T3">¿Qué s</text:span>iginifcan<text:span text:style-name="T3"> las siguientes siglas?</text:span></text:p>
          <text:list>
            <text:list-item>
              <text:p text:style-name="P8" loext:marker-style-name="T5"><text:bookmark text:name="_heading=h.gjdgxs"/><text:span text:style-name="T5">DDL</text:span><text:span text:style-name="T5"/></text:p>
            </text:list-item>
            <text:list-item>
              <text:p text:style-name="P8" loext:marker-style-name="T5"><text:span text:style-name="T5">DML</text:span><text:span text:style-name="T5"/></text:p>
            </text:list-item>
            <text:list-item>
              <text:p text:style-name="P8" loext:marker-style-name="T5"><text:span text:style-name="T5">DCL</text:span><text:span text:style-name="T5"/></text:p>
            </text:list-item>
            <text:list-item>
              <text:p text:style-name="P8" loext:marker-style-name="T5"><text:span text:style-name="T5">TCL</text:span><text:span text:style-name="T5"/></text:p>
            </text:list-item>
          </text:list>
        </text:list-item>
      </text:list>
      <text:p text:style-name="P9" loext:marker-style-name="T3"/>
      <text:list text:continue-numbering="true" text:style-name="WWNum1">
        <text:list-item>
          <text:p text:style-name="P3"><text:span text:style-name="T3">¿Qué es el lenguaje SQL?</text:span></text:p>
        </text:list-item>
      </text:list>
      <text:p text:style-name="P7" loext:marker-style-name="T3">Es un lenguaje en el que puedes hacer bases de datos.</text:p>
      <text:list text:continue-numbering="true" text:style-name="WWNum1">
        <text:list-item>
          <text:p text:style-name="P10"><text:span text:style-name="T3">¿Qué hace la siguiente consulta?</text:span></text:p>
        </text:list-item>
      </text:list>
      <text:p text:style-name="P11" loext:marker-style-name="T6"><text:span text:style-name="T6">SELECT precio, caducidad FROM alimentos</text:span><text:span text:style-name="T6"/></text:p>
      <text:p text:style-name="P11" loext:marker-style-name="T6"><text:span text:style-name="T6">WHERE categoria like ‘%merienda%’</text:span><text:span text:style-name="T6"/></text:p>
      <text:p text:style-name="P12" loext:marker-style-name="T6"/>
      <text:p text:style-name="P13"><text:tab/><text:span text:style-name="T7">Selecciona el precio y la caducidad de la tabla alimentos y ahi saca solo la categoria</text:span></text:p>
      <text:p text:style-name="P14"><text:tab/>merienda.</text:p>
      <text:p text:style-name="P15" loext:marker-style-name="T6"/>
      <text:list text:continue-numbering="true" text:style-name="WWNum1">
        <text:list-item>
          <text:p text:style-name="P10"><text:span text:style-name="T3">¿Qué hace la siguiente consulta?</text:span></text:p>
        </text:list-item>
      </text:list>
      <text:p text:style-name="P11" loext:marker-style-name="T6"><text:span text:style-name="T6">SELECT metrica, COUNT(*) FROM suministros</text:span><text:span text:style-name="T6"/></text:p>
      <text:p text:style-name="P11" loext:marker-style-name="T6"><text:span text:style-name="T6">WHERE categoria=’tornillo’</text:span><text:span text:style-name="T6"/></text:p>
      <text:p text:style-name="P11" loext:marker-style-name="T6"><text:span text:style-name="T6">GROUP by metrica</text:span><text:span text:style-name="T6"/></text:p>
      <text:p text:style-name="P15" loext:marker-style-name="T6"/>
      <text:p text:style-name="P16"><text:soft-page-break/>Selecciona todos los datos de la metrica de la tabla suministros y saca solo</text:p>
      <text:p text:style-name="P16">la categoria tornillo y ahi lo agrupa mediante metrica.</text:p>
      <text:p text:style-name="P15" loext:marker-style-name="T6"/>
      <text:list text:continue-numbering="true" text:style-name="WWNum1">
        <text:list-item>
          <text:p text:style-name="P3"><text:span text:style-name="T3">¿Qué sentencia se utiliza en SQL para eliminar entradas de una tabla?</text:span></text:p>
        </text:list-item>
      </text:list>
      <text:p text:style-name="P7" loext:marker-style-name="T3">DELETE</text:p>
      <text:list text:continue-numbering="true" text:style-name="WWNum1">
        <text:list-item>
          <text:p text:style-name="P17">¿Qué permisos se pueden asignar a los distintos usuarios de una base de datos?</text:p>
        </text:list-item>
      </text:list>
      <text:p text:style-name="P18">Ni idea.</text:p>
      <text:list text:continue-numbering="true" text:style-name="WWNum1">
        <text:list-item>
          <text:p text:style-name="P3"><text:span text:style-name="T3">¿Cómo se gestiona la seguridad de una base de datos?</text:span></text:p>
        </text:list-item>
      </text:list>
      <text:p text:style-name="P19" loext:marker-style-name="T3"><text:tab/><text:span text:style-name="T4">Mediante permisos a los usuarios que la usen supongo.</text:span></text:p>
      <text:list text:continue-numbering="true" text:style-name="WWNum1">
        <text:list-item>
          <text:p text:style-name="P3"><text:span text:style-name="T3">¿Qué es una transacción de base de datos?</text:span></text:p>
        </text:list-item>
      </text:list>
      <text:p text:style-name="P7" loext:marker-style-name="T3">Pasar la base de datos de un equipo/servidor a otro supongo.</text:p>
      <text:list text:continue-numbering="true" text:style-name="WWNum1">
        <text:list-item>
          <text:p text:style-name="P3"><text:span text:style-name="T3">¿Para qué sirve el lenguaje PL/SQL?</text:span></text:p>
        </text:list-item>
      </text:list>
      <text:p text:style-name="P7" loext:marker-style-name="T3">PL no se lo que es pero SQL para hacer bases de datos.</text:p>
      <text:list text:continue-numbering="true" text:style-name="WWNum1">
        <text:list-item>
          <text:p text:style-name="P3"><text:span text:style-name="T3">¿Qué es un trigger de base de datos?</text:span></text:p>
        </text:list-item>
      </text:list>
      <text:p text:style-name="P20">Un trigger es un activador que hace que pase algo,osea que si se activa el trigger te saque una x consulta o algo del estilo.</text:p>
      <text:list text:continue-numbering="true" text:style-name="WWNum1">
        <text:list-item>
          <text:p text:style-name="P3"><text:span text:style-name="T3">¿Qué es una vista de base de datos?</text:span></text:p>
        </text:list-item>
      </text:list>
      <text:p text:style-name="P7" loext:marker-style-name="T3">La forma en la que se presenta la base de datos supongo.</text:p>
      <text:list text:continue-numbering="true" text:style-name="WWNum1">
        <text:list-item>
          <text:p text:style-name="P3"><text:span text:style-name="T3">¿Qué es una base de datos orientada a objetos?</text:span></text:p>
        </text:list-item>
      </text:list>
      <text:p text:style-name="P7" loext:marker-style-name="T3">Una base de datos que esta hecha para algo relacionado con objetos,compras,ect.</text:p>
      <text:list text:continue-numbering="true" text:style-name="WWNum1">
        <text:list-item>
          <text:p text:style-name="P3"><text:span text:style-name="T3">¿Has trabajado alguna vez con bases de datos? ¿Y como administrador de bases de datos?</text:span></text:p>
        </text:list-item>
      </text:list>
      <text:p text:style-name="P7" loext:marker-style-name="T3">He hecho bases de datos en el grado medio del que vengo pero no he trabajado como tal en nada.</text:p>
      <text:list text:continue-numbering="true" text:style-name="WWNum1">
        <text:list-item>
          <text:p text:style-name="P3"><text:span text:style-name="T3">¿Qué bases de datos has utilizado y a qué nivel?</text:span></text:p>
        </text:list-item>
      </text:list>
      <text:p text:style-name="P7" loext:marker-style-name="T8">MySQL a un nivel basico.<text:span text:style-name="T9"/></text:p>
      <text:p text:style-name="P21" loext:marker-style-name="T3"/>
      <text:p text:style-name="Standard"/>
      <text:p text:style-name="P21" loext:marker-style-name="T3"/>
      <text:p text:style-name="Standard"/>
      <text:p text:style-name="P22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9-21T16:10:00</meta:creation-date>
    <meta:initial-creator>Angel</meta:initial-creator>
    <dc:date>2025-09-17T11:07:36.347928800</dc:date>
    <meta:editing-duration>PT36S</meta:editing-duration>
    <meta:editing-cycles>1</meta:editing-cycles>
    <meta:document-statistic meta:table-count="0" meta:image-count="0" meta:object-count="0" meta:page-count="2" meta:paragraph-count="56" meta:word-count="596" meta:character-count="3051" meta:non-whitespace-character-count="2534"/>
    <meta:generator>LibreOffice/25.8.1.1$Windows_X86_64 LibreOffice_project/54047653041915e595ad4e45cccea684809c77b5</meta:generator>
    <meta:user-defined meta:name="ICV">D2D42A8BF41F475DB25ED4FA5761EEA5</meta:user-defined>
    <meta:user-defined meta:name="KSOProductBuildVer">3082-12.2.0.13215</meta:user-defined>
  </office:meta>
</office:document-meta>
</file>