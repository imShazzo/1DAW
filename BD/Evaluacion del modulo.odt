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180eac" officeooo:paragraph-rsid="00180eac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endo como se evalu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09:22:17.516094400</meta:creation-date>
    <dc:date>2025-10-27T09:23:42.550729500</dc:date>
    <meta:editing-duration>PT1M25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25.8.1.1$Windows_X86_64 LibreOffice_project/54047653041915e595ad4e45cccea684809c77b5</meta:generator>
  </office:meta>
</office:document-meta>
</file>