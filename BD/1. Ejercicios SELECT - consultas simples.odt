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left="1.27cm" fo:text-indent="0cm" style:auto-text-indent="false"/>
    </style:style>
    <style:style style:name="P3" style:family="paragraph" style:parent-style-name="normal">
      <style:paragraph-properties fo:margin-left="2.54cm" fo:text-indent="0cm" style:auto-text-indent="false"/>
    </style:style>
    <style:style style:name="P4" style:family="paragraph" style:parent-style-name="normal" style:list-style-name="WWNum2">
      <style:paragraph-properties fo:margin-left="1.27cm" fo:text-indent="-0.635cm" style:auto-text-indent="false"/>
    </style:style>
    <style:style style:name="P5" style:family="paragraph" style:parent-style-name="normal">
      <style:paragraph-properties fo:margin-left="1.27cm" fo:text-indent="0cm" style:auto-text-indent="false"/>
      <style:text-properties fo:font-style="italic" officeooo:rsid="000b5fd9" officeooo:paragraph-rsid="000b5fd9" style:font-style-asian="italic"/>
    </style:style>
    <style:style style:name="P6" style:family="paragraph" style:parent-style-name="normal">
      <style:paragraph-properties fo:margin-left="1.27cm" fo:text-indent="0cm" style:auto-text-indent="false"/>
      <style:text-properties officeooo:rsid="000b5fd9" officeooo:paragraph-rsid="000b5fd9"/>
    </style:style>
    <style:style style:name="P7" style:family="paragraph" style:parent-style-name="normal">
      <style:paragraph-properties fo:margin-left="1.27cm" fo:text-indent="0cm" style:auto-text-indent="false"/>
      <style:text-properties fo:font-style="italic" officeooo:rsid="000b5fd9" officeooo:paragraph-rsid="000cc2c5" style:font-style-asian="italic"/>
    </style:style>
    <style:style style:name="P8" style:family="paragraph" style:parent-style-name="normal">
      <style:paragraph-properties fo:margin-left="1.27cm" fo:text-indent="0cm" style:auto-text-indent="false"/>
      <style:text-properties fo:font-style="italic" officeooo:rsid="000cc2c5" officeooo:paragraph-rsid="000cc2c5" style:font-style-asian="italic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0" style:family="paragraph" style:parent-style-name="normal">
      <style:text-properties officeooo:rsid="000cc2c5" officeooo:paragraph-rsid="000cc2c5"/>
    </style:style>
    <style:style style:name="P11" style:family="paragraph" style:parent-style-name="normal">
      <style:text-properties fo:color="#ff0000" loext:opacity="100%" fo:font-style="italic" officeooo:rsid="000cc2c5" officeooo:paragraph-rsid="000cc2c5" style:font-style-asian="italic"/>
    </style:style>
    <style:style style:name="P12" style:family="paragraph" style:parent-style-name="normal">
      <style:paragraph-properties fo:margin-left="1.27cm" fo:text-indent="0cm" style:auto-text-indent="false"/>
      <style:text-properties officeooo:rsid="000d8c90" officeooo:paragraph-rsid="000d8c90"/>
    </style:style>
    <style:style style:name="P13" style:family="paragraph" style:parent-style-name="normal">
      <style:paragraph-properties fo:margin-left="2.54cm" fo:text-indent="0cm" style:auto-text-indent="false"/>
      <style:text-properties officeooo:rsid="000d8c90" officeooo:paragraph-rsid="000d8c90"/>
    </style:style>
    <style:style style:name="P14" style:family="paragraph" style:parent-style-name="normal" style:list-style-name="WWNum2">
      <style:paragraph-properties fo:margin-left="1.27cm" fo:text-indent="-0.635cm" style:auto-text-indent="false"/>
      <style:text-properties officeooo:paragraph-rsid="000d8c90"/>
    </style:style>
    <style:style style:name="P15" style:family="paragraph" style:parent-style-name="normal">
      <style:paragraph-properties fo:margin-left="1.27cm" fo:text-indent="0cm" style:auto-text-indent="false"/>
      <style:text-properties fo:font-style="italic" officeooo:rsid="000d8c90" officeooo:paragraph-rsid="000d8c90" style:font-style-asian="italic"/>
    </style:style>
    <style:style style:name="P16" style:family="paragraph" style:parent-style-name="normal">
      <style:paragraph-properties fo:margin-left="0cm" fo:text-indent="0cm" style:auto-text-indent="false"/>
      <style:text-properties fo:color="#ff0000" loext:opacity="100%" fo:font-style="italic" officeooo:paragraph-rsid="000f07d0" style:font-style-asian="italic"/>
    </style:style>
    <style:style style:name="P17" style:family="paragraph" style:parent-style-name="normal">
      <style:paragraph-properties fo:margin-left="1.27cm" fo:text-indent="0cm" style:auto-text-indent="false"/>
      <style:text-properties fo:font-style="italic" fo:font-weight="bold" style:font-style-asian="italic" style:font-weight-asian="bold"/>
    </style:style>
    <style:style style:name="P18" style:family="paragraph" style:parent-style-name="normal" style:list-style-name="WWNum1">
      <style:paragraph-properties fo:margin-left="1.27cm" fo:text-indent="-0.635cm" style:auto-text-indent="false"/>
    </style:style>
    <style:style style:name="P19" style:family="paragraph" style:parent-style-name="normal">
      <style:paragraph-properties fo:text-indent="1.27cm" style:auto-text-indent="false"/>
      <style:text-properties fo:color="#ff0000" loext:opacity="100%" fo:font-style="italic" style:font-style-asian="italic"/>
    </style:style>
    <style:style style:name="P20" style:family="paragraph" style:parent-style-name="normal">
      <style:paragraph-properties fo:margin-left="1.27cm" fo:text-indent="0cm" style:auto-text-indent="false"/>
      <style:text-properties fo:color="#ff0000" loext:opacity="100%" fo:font-style="italic" style:font-style-asian="italic"/>
    </style:style>
    <style:style style:name="P21" style:family="paragraph" style:parent-style-name="normal">
      <style:text-properties fo:font-style="italic" style:font-style-asian="italic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0000ff" loext:opacity="100%" fo:font-style="italic" fo:font-weight="bold" style:font-style-asian="italic" style:font-weight-asian="bold"/>
    </style:style>
    <style:style style:name="T4" style:family="text">
      <style:text-properties fo:color="#0000ff" loext:opacity="100%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cc2c5"/>
    </style:style>
    <style:style style:name="T7" style:family="text">
      <style:text-properties style:text-underline-style="none"/>
    </style:style>
    <style:style style:name="T8" style:family="text">
      <style:text-properties fo:color="#000000" loext:opacity="100%" fo:font-style="italic" style:font-style-asian="italic"/>
    </style:style>
    <style:style style:name="T9" style:family="text">
      <style:text-properties fo:color="#000000" loext:opacity="100%"/>
    </style:style>
    <style:style style:name="T10" style:family="text">
      <style:text-properties fo:font-style="italic" style:text-underline-style="none" style:font-style-asian="italic"/>
    </style:style>
    <style:style style:name="T11" style:family="text">
      <style:text-properties fo:font-style="italic" style:text-underline-style="solid" style:text-underline-width="auto" style:text-underline-color="font-color" style:font-style-asian="italic"/>
    </style:style>
    <style:style style:name="T12" style:family="text">
      <style:text-properties fo:color="#000000" loext:opacity="100%" officeooo:rsid="000d8c90"/>
    </style:style>
    <style:style style:name="T13" style:family="text">
      <style:text-properties fo:color="#000000" loext:opacity="100%" officeooo:rsid="000f07d0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color="#ff0000" loext:opacity="100%" fo:font-style="italic" style:font-style-asian="italic"/>
    </style:style>
    <style:style style:name="T16" style:family="text">
      <style:text-properties fo:color="#0000ff" loext:opacity="100%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onsultas simples (con </text:span><text:span text:style-name="T2">filtros, ordenación, alias…</text:span><text:span text:style-name="T1">)</text:span></text:p>
      <text:p text:style-name="normal"><text:tab/></text:p>
      <text:p text:style-name="P2" loext:marker-style-name="T3"><text:span text:style-name="T4">Base de datos </text:span><text:span text:style-name="T3">NBA</text:span></text:p>
      <text:p text:style-name="P3"/>
      <text:list text:style-name="WWNum2">
        <text:list-item>
          <text:p text:style-name="P4" loext:marker-style-name="T5">Devuelve el nombre de todos los jugadores<text:span text:style-name="T5"/></text:p>
        </text:list-item>
      </text:list>
      <text:p text:style-name="P5" loext:marker-style-name="T5">SELECT nombre FROM jugadores;</text:p>
      <text:list text:continue-numbering="true" text:style-name="WWNum2">
        <text:list-item>
          <text:p text:style-name="P4" loext:marker-style-name="T5">Devuelve el nombre y la posición en la que juega cada jugador<text:span text:style-name="T5"/></text:p>
        </text:list-item>
      </text:list>
      <text:p text:style-name="P5" loext:marker-style-name="T5">SELECT nombre,posicion FROM jugadores;</text:p>
      <text:list text:continue-numbering="true" text:style-name="WWNum2">
        <text:list-item>
          <text:p text:style-name="P4" loext:marker-style-name="T5">Devuelve el nombre, la posición y el nombre del equipo en el que juega cada jugador<text:span text:style-name="T5"/></text:p>
        </text:list-item>
      </text:list>
      <text:p text:style-name="P5" loext:marker-style-name="T5">SELECT nombre,posicion,nombre_equipo FROM jugadores;</text:p>
      <text:list text:continue-numbering="true" text:style-name="WWNum2">
        <text:list-item>
          <text:p text:style-name="P4">Devuelve todos los campos de los jugadores</text:p>
        </text:list-item>
      </text:list>
      <text:p text:style-name="P6">SELECT * FROM jugadores;</text:p>
      <text:list text:continue-numbering="true" text:style-name="WWNum2">
        <text:list-item>
          <text:p text:style-name="P4" loext:marker-style-name="T5">Devuelve el nombre y el peso de cada jugador que juega en el equipo llamado ‘<text:span text:style-name="T5">Lakers</text:span>’</text:p>
        </text:list-item>
      </text:list>
      <text:p text:style-name="P5" loext:marker-style-name="T5">SELECT nombre,peso FROM jugadores WHERE nombre_equipo=”Lakers”;</text:p>
      <text:list text:continue-numbering="true" text:style-name="WWNum2">
        <text:list-item>
          <text:p text:style-name="P4" loext:marker-style-name="T5">Devuelve el nombre y la altura de cada jugador cuyo nombre de equipo empieza por ‘<text:span text:style-name="T5">L</text:span>’</text:p>
        </text:list-item>
      </text:list>
      <text:p text:style-name="P5" loext:marker-style-name="T5">SELECT nombre,altura FROM jugadores WHERE nombre_equipo <text:span text:style-name="T6">LIKE </text:span>”L%”;</text:p>
      <text:list text:continue-numbering="true" text:style-name="WWNum2">
        <text:list-item>
          <text:p text:style-name="P4" loext:marker-style-name="T5">Devuelve el nombre y la altura de cada jugador cuyo nombre de equipo termina por ‘<text:span text:style-name="T5">s</text:span>’</text:p>
        </text:list-item>
      </text:list>
      <text:p text:style-name="P7" loext:marker-style-name="T5">SELECT nombre,altura FROM jugadores WHERE nombre_equipo <text:span text:style-name="T6">LIKE </text:span>”%<text:span text:style-name="T6">s</text:span>”;</text:p>
      <text:list text:continue-numbering="true" text:style-name="WWNum2">
        <text:list-item>
          <text:p text:style-name="P4" loext:marker-style-name="T5">Devuelve el nombre y la altura de cada jugador cuyo nombre de equipo tenga la ‘<text:span text:style-name="T5">a</text:span>’ como segunda letra</text:p>
        </text:list-item>
      </text:list>
      <text:p text:style-name="P7" loext:marker-style-name="T5">SELECT nombre,altura FROM jugadores WHERE nombre_equipo <text:span text:style-name="T6">LIKE </text:span>”%<text:span text:style-name="T6">a%</text:span>”;</text:p>
      <text:list text:continue-numbering="true" text:style-name="WWNum2">
        <text:list-item>
          <text:p text:style-name="P4" loext:marker-style-name="T5">Devuelve el nombre y el peso de cada jugador cuyo peso sea mayor a 225<text:span text:style-name="T5"/></text:p>
        </text:list-item>
      </text:list>
      <text:p text:style-name="P8" loext:marker-style-name="T5">SELECT nombre,peso FROM jugadores WHERE peso&gt;225;</text:p>
      <text:list text:continue-numbering="true" text:style-name="WWNum2">
        <text:list-item>
          <text:p text:style-name="P4" loext:marker-style-name="T5">Devuelve el nombre y el peso de cada jugador cuyo peso esté entre 220 y 230<text:span text:style-name="T5"/></text:p>
        </text:list-item>
      </text:list>
      <text:p text:style-name="P8" loext:marker-style-name="T5">SELECT nombre,peso FROM jugadores WHERE peso BETWEEN 220 AND 230;</text:p>
      <text:list text:continue-numbering="true" text:style-name="WWNum2">
        <text:list-item>
          <text:p text:style-name="P4" loext:marker-style-name="T5">Devuelve el nombre y el peso de cada jugador cuyo peso sea diferente a 220<text:span text:style-name="T5"/></text:p>
        </text:list-item>
      </text:list>
      <text:p text:style-name="P8" loext:marker-style-name="T5">SELECT nombre,peso FROM jugadores WHERE peso&lt;&gt;220;</text:p>
      <text:list text:continue-numbering="true" text:style-name="WWNum2">
        <text:list-item>
          <text:p text:style-name="P4">Devuelve el nombre los jugadores que juegan los equipos ‘Lakers’, ‘Celtics’ o ‘Nuggets’</text:p>
        </text:list-item>
      </text:list>
      <text:p text:style-name="P9"><text:tab/></text:p>
      <text:list text:continue-numbering="true" text:style-name="WWNum2">
        <text:list-item>
          <text:p text:style-name="P4">Devuelve el nombre los jugadores que juegan los equipos ‘Lakers’, ‘Celtics’ o ‘Nuggets’</text:p>
        </text:list-item>
      </text:list>
      <text:p text:style-name="P7" loext:marker-style-name="T5">SELECT nombre FROM jugadores WHERE nombre_equipo <text:span text:style-name="T6">IN (”Lakers”,”Celtics”,”Nuggets”)</text:span>;</text:p>
      <text:list text:continue-numbering="true" text:style-name="WWNum2">
        <text:list-item>
          <text:p text:style-name="P4" loext:marker-style-name="T7">Devuelve el nombre de los jugadores que no juegan en ninguna posición.<text:span text:style-name="T7"/></text:p>
        </text:list-item>
      </text:list>
      <text:p text:style-name="P10"><text:tab/>SELECT nombre FROM jugadores WHERE posicion IS NULL;</text:p>
      <text:list text:continue-numbering="true" text:style-name="WWNum2">
        <text:list-item>
          <text:p text:style-name="P4" loext:marker-style-name="T7">Devuelve el nombre de los equipos que pertenecen a alguna conferencia<text:span text:style-name="T7"/></text:p>
        </text:list-item>
      </text:list>
      <text:p text:style-name="P11" loext:marker-style-name="T8"><text:tab/><text:span text:style-name="T9">SELECT nombre FROM equipos WHERE conferencia IS NOT NULL;</text:span></text:p>
      <text:list text:continue-numbering="true" text:style-name="WWNum2">
        <text:list-item>
          <text:p text:style-name="P4" loext:marker-style-name="T10">Devuelve el nombre de los 3 primeros equipos<text:span text:style-name="T10"/></text:p>
        </text:list-item>
      </text:list>
      <text:p text:style-name="P12">SELECT nombre FROM equipos LIMIT 3;</text:p>
      <text:list text:continue-numbering="true" text:style-name="WWNum2">
        <text:list-item>
          <text:p text:style-name="P4" loext:marker-style-name="T7">Devuelve el nombre de los equipos 4, 5 y 6<text:span text:style-name="T7"/></text:p>
        </text:list-item>
      </text:list>
      <text:p text:style-name="P12">SELECT nombre FROM equipos LIMIT 4,3;</text:p>
      <text:list text:continue-numbering="true" text:style-name="WWNum2">
        <text:list-item>
          <text:p text:style-name="P4">Devuele el nombre de cada jugador y de su equipo, renombrando el nombre del equipo ‘<text:span text:style-name="T5">equipo_jugador</text:span>’</text:p>
        </text:list-item>
      </text:list>
      <text:p text:style-name="P13">SELECT nombre,nombre_equipo AS equipo FROM jugadores;</text:p>
      <text:list text:continue-numbering="true" text:style-name="WWNum2">
        <text:list-item>
          <text:p text:style-name="P14"><text:soft-page-break/>Devuelve el nombre y el peso de cada jugador cuyo peso esté entre 220 y 230 ordenado ascendentemente por peso</text:p>
        </text:list-item>
      </text:list>
      <text:p text:style-name="P15" loext:marker-style-name="T11">SELECT nombre,peso FROM jugadores WHERE peso BETWEEN 220 AND 230 ORDER BY peso;</text:p>
      <text:list text:continue-numbering="true" text:style-name="WWNum2">
        <text:list-item>
          <text:p text:style-name="P4" loext:marker-style-name="T5">Devuelve el nombre y el peso de cada jugador cuyo peso esté entre 220 y 230 ordenado descendentemente por nombre<text:span text:style-name="T5"/></text:p>
        </text:list-item>
      </text:list>
      <text:p text:style-name="P15" loext:marker-style-name="T11">SELECT nombre,peso FROM jugadores WHERE peso BETWEEN 220 AND 230 ORDER BY nombre DESC;</text:p>
      <text:list text:continue-numbering="true" text:style-name="WWNum2">
        <text:list-item>
          <text:p text:style-name="P4" loext:marker-style-name="T5">Devuelve el nombre y el peso de cada jugador cuyo peso esté entre 220 y 230 ordenado descendentemente por nombre y ascendentemente por peso<text:span text:style-name="T5"/></text:p>
        </text:list-item>
      </text:list>
      <text:p text:style-name="P16" loext:marker-style-name="T8"><text:tab/><text:span text:style-name="T12">SELECT nombre,peso FROM jugadores WHERE peso BETWEEN 220 AND 230 <text:tab/></text:span><text:span text:style-name="T13">ORDER BY</text:span><text:span text:style-name="T12"> </text:span><text:span text:style-name="T13">nombre DESC peso ASC;</text:span></text:p>
      <text:list text:continue-numbering="true" text:style-name="WWNum2">
        <text:list-item>
          <text:p text:style-name="P4">Devuelve un listado con los nombres de todos los equipos</text:p>
        </text:list-item>
      </text:list>
      <text:p text:style-name="normal"><text:tab/></text:p>
      <text:list text:continue-numbering="true" text:style-name="WWNum2">
        <text:list-item>
          <text:p text:style-name="P4">Devuelve un listado con los nombres de todos los equipos, sin repetir ningún nombre de equipo</text:p>
        </text:list-item>
      </text:list>
      <text:p text:style-name="normal"/>
      <text:p text:style-name="P2" loext:marker-style-name="T3"><text:span text:style-name="T4">Base de datos </text:span><text:span text:style-name="T3">Notas</text:span></text:p>
      <text:p text:style-name="P17" loext:marker-style-name="T14"/>
      <text:list text:style-name="WWNum1">
        <text:list-item>
          <text:p text:style-name="P18">Consultar todos los datos de los alumnos.</text:p>
        </text:list-item>
      </text:list>
      <text:p text:style-name="P2"/>
      <text:list text:continue-numbering="true" text:style-name="WWNum1">
        <text:list-item>
          <text:p text:style-name="P18" loext:marker-style-name="T5">Consultar los siguientes datos de alumnos: DNI, NOMBRE, APELLIDOS, CURSO, NIVEL y CLASE.<text:span text:style-name="T5"/></text:p>
        </text:list-item>
      </text:list>
      <text:p text:style-name="P19" loext:marker-style-name="T15"/>
      <text:list text:continue-numbering="true" text:style-name="WWNum1">
        <text:list-item>
          <text:p text:style-name="P18" loext:marker-style-name="T5">Consultar NOMBRE y APELLIDOS de todos los alumnos cuya POBLACIÓN sea <text:tab/>‘GUADALAJARA’<text:span text:style-name="T4">.</text:span><text:span text:style-name="T16"/></text:p>
        </text:list-item>
      </text:list>
      <text:p text:style-name="P19" loext:marker-style-name="T15"/>
      <text:list text:continue-numbering="true" text:style-name="WWNum1">
        <text:list-item>
          <text:p text:style-name="P18" loext:marker-style-name="T5">Consultar el DNI, NOMBRE, APELLIDOS, CURSO, NIVEL y CLASE de todos los alumnos ordenado por APELLIDOS y NOMBRE ascendentemente.<text:span text:style-name="T5"/></text:p>
        </text:list-item>
      </text:list>
      <text:p text:style-name="P20" loext:marker-style-name="T15"/>
      <text:list text:continue-numbering="true" text:style-name="WWNum1">
        <text:list-item>
          <text:p text:style-name="P18" loext:marker-style-name="T5">Consultar aquellos DNI cuya fecha de nacimiento sea nula.<text:span text:style-name="T5"/></text:p>
        </text:list-item>
      </text:list>
      <text:p text:style-name="P20" loext:marker-style-name="T15"/>
      <text:list text:continue-numbering="true" text:style-name="WWNum1">
        <text:list-item>
          <text:p text:style-name="P18" loext:marker-style-name="T5">Consultar todos los datos de los alumnos cuya fecha de nacimiento no sea nula.<text:span text:style-name="T5"/></text:p>
        </text:list-item>
      </text:list>
      <text:p text:style-name="P19" loext:marker-style-name="T15"/>
      <text:list text:continue-numbering="true" text:style-name="WWNum1">
        <text:list-item>
          <text:p text:style-name="P18" loext:marker-style-name="T5">Consultar el DNI, NOMBRE y APELLIDOS de todos aquellos alumnos que tengan entre sus apellidos el apellido ‘Pérez’.<text:line-break/><text:span text:style-name="T5"/></text:p>
        </text:list-item>
        <text:list-item>
          <text:p text:style-name="P18" loext:marker-style-name="T5">Consultar el DNI, NOMBRE, APELLIDOS, CURSO, NIVEL y CLASE de todos los alumnos cuya población sea alguna de las siguientes: ‘MARCHAMALO’, <text:tab/>‘CABANILLAS’ o ‘YUNQUERA’.<text:span text:style-name="T5"/></text:p>
        </text:list-item>
      </text:list>
      <text:p text:style-name="P21" loext:marker-style-name="T5"/>
      <text:list text:continue-numbering="true" text:style-name="WWNum1">
        <text:list-item>
          <text:p text:style-name="P18" loext:marker-style-name="T5">Obtener el DNI, NOMBRE, APELLIDOS, NIVEL y la media de faltas de los tres trimestres para aquellos alumnos de ‘ESO’ y ‘ESI’.<text:span text:style-name="T4"><text:line-break/></text:span><text:span text:style-name="T16"/></text:p>
        </text:list-item>
        <text:list-item>
          <text:p text:style-name="P18" loext:marker-style-name="T5">Consultar los datos de los alumnos que tengan faltas con valor nulo.<text:span text:style-name="T4"><text:line-break/></text:span><text:span text:style-name="T16"/></text:p>
        </text:list-item>
        <text:list-item>
          <text:p text:style-name="P18" loext:marker-style-name="T5"><text:soft-page-break/>Obtener el NOMBRE y APELLIDOS de todos los alumnos de cuarto de ‘ESO’ de la clase ‘B’ ordenados por APELLIDOS y NOMBRE ascendentemente.<text:span text:style-name="T4"><text:line-break/></text:span><text:span text:style-name="T16"/></text:p>
        </text:list-item>
        <text:list-item>
          <text:p text:style-name="P18" loext:marker-style-name="T5">Obtener el NOMBRE, APELLIDOS y el total de faltas de los tres trimestres de todos los alumnos de cuarto de ‘ESO’ de la clase ‘B’ ordenados por APELLIDOS y NOMBRE ascendentemente.<text:span text:style-name="T5"/></text:p>
        </text:list-item>
      </text:list>
      <text:p text:style-name="P21" loext:marker-style-name="T5"/>
      <text:list text:continue-numbering="true" text:style-name="WWNum1">
        <text:list-item>
          <text:p text:style-name="P18" loext:marker-style-name="T5">Consultar el DNI, NOMBRE, APELLIDOS, CURSO, NIVEL y CLASE de todos los alumnos ordenado por CURSO, NIVEL, CLASE ascendentemente y APELLIDOS descendentemente cuyo nivel no sea ni ‘ESO’ ni ‘BAC’.<text:span text:style-name="T5"/></text:p>
        </text:list-item>
      </text:list>
      <text:p text:style-name="P21" loext:marker-style-name="T5"/>
      <text:list text:continue-numbering="true" text:style-name="WWNum1">
        <text:list-item>
          <text:p text:style-name="P18" loext:marker-style-name="T5">Obtener los nombres de alumnos de la tabla NOTAS_ALUMNOS que tengan alguna nota con valor nulo.<text:span text:style-name="T4"><text:line-break/></text:span><text:span text:style-name="T16"/></text:p>
        </text:list-item>
        <text:list-item>
          <text:p text:style-name="P18" loext:marker-style-name="T5">Obtener los datos de los alumnos de la tabla NOTAS_ALUMNOS que no tengan un 7 en ningún control de la asignatura de LENGUA.<text:line-break/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00" loext:opacity="100%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loext:opacity="100%" style:font-name="Arial" fo:font-family="Arial" style:font-family-generic="roman" style:font-pitch="variable" style:text-underline-style="none" fo:font-weight="normal" style:font-name-asian="Arial2" style:font-family-asian="Arial" style:font-family-generic-asian="system" style:font-pitch-asian="variable" style:font-weight-asian="normal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8T11:53:48.294088500</dc:date>
    <meta:editing-duration>PT1H4M32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64" meta:word-count="807" meta:character-count="4817" meta:non-whitespace-character-count="4094"/>
  </office:meta>
</office:document-meta>
</file>