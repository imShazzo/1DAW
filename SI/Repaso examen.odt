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4000002EDD35D272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619cm"/>
    </style:style>
    <style:style style:name="P1" style:family="paragraph" style:parent-style-name="Standard">
      <style:text-properties fo:font-weight="bold" officeooo:rsid="0011e041" officeooo:paragraph-rsid="0011e041" style:font-weight-asian="bold" style:font-weight-complex="bold"/>
    </style:style>
    <style:style style:name="P2" style:family="paragraph" style:parent-style-name="Standard">
      <style:text-properties officeooo:rsid="0011e041" officeooo:paragraph-rsid="0011e041"/>
    </style:style>
    <style:style style:name="P3" style:family="paragraph" style:parent-style-name="Table_20_Contents">
      <style:text-properties fo:font-weight="bold" officeooo:rsid="0011e041" officeooo:paragraph-rsid="0011e041" style:font-weight-asian="bold" style:font-weight-complex="bold"/>
    </style:style>
    <style:style style:name="P4" style:family="paragraph" style:parent-style-name="Table_20_Contents">
      <style:text-properties officeooo:rsid="0011e041" officeooo:paragraph-rsid="0011e041"/>
    </style:style>
    <style:style style:name="P5" style:family="paragraph" style:parent-style-name="Standard">
      <style:text-properties fo:font-weight="bold" officeooo:rsid="001355b9" officeooo:paragraph-rsid="001355b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os del sistema hexadecimal.</text:p>
      <text:p text:style-name="P2"/>
      <text:p text:style-name="P2">RGB</text:p>
      <text:p text:style-name="P2">IPV6</text:p>
      <text:p text:style-name="P2">MAC</text:p>
      <text:p text:style-name="P2">Unicode</text:p>
      <text:p text:style-name="P2">Recopilacion datos disco</text:p>
      <text:p text:style-name="P2">Codigo error</text:p>
      <text:p text:style-name="P2">Criptografia</text:p>
      <text:p text:style-name="P2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3">Decimal</text:p>
          </table:table-cell>
          <table:table-cell table:style-name="Tabla1.A1" office:value-type="string">
            <text:p text:style-name="P3">Binario</text:p>
          </table:table-cell>
          <table:table-cell table:style-name="Tabla1.A1" office:value-type="string">
            <text:p text:style-name="P3">Octal</text:p>
          </table:table-cell>
          <table:table-cell table:style-name="Tabla1.D1" office:value-type="string">
            <text:p text:style-name="P3">Hexadecimal</text:p>
          </table:table-cell>
        </table:table-row>
        <table:table-row>
          <table:table-cell table:style-name="Tabla1.A2" office:value-type="string">
            <text:p text:style-name="P4">0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4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8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9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1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1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a1.15">
          <table:table-cell table:style-name="Tabla1.A2" office:value-type="string">
            <text:p text:style-name="P4">1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a1.15">
          <table:table-cell table:style-name="Tabla1.A2" office:value-type="string">
            <text:p text:style-name="P4">14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a1.15">
          <table:table-cell table:style-name="Tabla1.A2" office:value-type="string">
            <text:p text:style-name="P4">15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2"><text:soft-page-break/></text:p>
      <text:p text:style-name="P1">Unidades de almacenamiento</text:p>
      <text:p text:style-name="P1">PB(Petabyte)</text:p>
      <text:p text:style-name="P1">TB(Terabtye)</text:p>
      <text:p text:style-name="P1">GB(Gigabyte)<text:line-break/>MB(Megabyte)</text:p>
      <text:p text:style-name="P1">KB(Kilobyte)</text:p>
      <text:p text:style-name="P1">Byte – 8 bits</text:p>
      <text:p text:style-name="P1">Bit – 0 y 1</text:p>
      <text:p text:style-name="P1"><draw:frame draw:style-name="fr1" draw:name="Imagen1" text:anchor-type="char" svg:x="0.381cm" svg:y="0.367cm" svg:width="17cm" svg:height="15.838cm" draw:z-index="0"><draw:image xlink:href="Pictures/1000000100000324000002EDD35D272B.png" xlink:type="simple" xlink:show="embed" xlink:actuate="onLoad" draw:mime-type="image/png"/></draw:frame></text:p>
      <text:p text:style-name="P5">5TB → ALL</text:p>
      <text:p text:style-name="P5">5TB → <text:span text:style-name="T1">5 x 1000 = </text:span>5000 GB</text:p>
      <text:p text:style-name="P5">5000GB → <text:span text:style-name="T1">5000 x 1000 = </text:span>5.000.000 MB</text:p>
      <text:p text:style-name="P5">5.000.000 MB → <text:span text:style-name="T1">5.000.000 x 1000 = </text:span>5.000.000.000 KB</text:p>
      <text:p text:style-name="P5">5.000.000.000 KB →<text:span text:style-name="T1"> 5.000.000.000 x 1000 = </text:span>5.000.000.000.000 Byte</text:p>
      <text:p text:style-name="P5">5.000.000.000.000 Byte → <text:span text:style-name="T1">5.000.000.000.000 x 8 = </text:span>40.000.000.000.000 Bits</text:p>
      <text:p text:style-name="P5">5TB → <text:span text:style-name="T1">5 : 1000 </text:span>= 0.005 PB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1:36:13.702759700</meta:creation-date>
    <dc:date>2025-10-08T12:09:43.776581600</dc:date>
    <meta:editing-duration>PT3M56S</meta:editing-duration>
    <meta:editing-cycles>1</meta:editing-cycles>
    <meta:document-statistic meta:table-count="1" meta:image-count="1" meta:object-count="0" meta:page-count="3" meta:paragraph-count="42" meta:word-count="103" meta:character-count="536" meta:non-whitespace-character-count="473"/>
    <meta:generator>LibreOffice/25.8.1.1$Windows_X86_64 LibreOffice_project/54047653041915e595ad4e45cccea684809c77b5</meta:generator>
  </office:meta>
</office:document-meta>
</file>