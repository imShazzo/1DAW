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30000023215689F61.png" manifest:media-type="image/png"/>
  <manifest:file-entry manifest:full-path="Pictures/100000010000041D000001EF79FB50B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bc8" officeooo:paragraph-rsid="000e1b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adecimal</text:p>
      <text:p text:style-name="P1"/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A<text:line-break/>B</text:p>
      <text:p text:style-name="P1">C</text:p>
      <text:p text:style-name="P1">D</text:p>
      <text:p text:style-name="P1">E</text:p>
      <text:p text:style-name="P1">F(15)</text:p>
      <text:p text:style-name="P1">...</text:p>
      <text:p text:style-name="P1"><draw:frame draw:style-name="fr1" draw:name="Imagen1" text:anchor-type="char" svg:x="0.619cm" svg:y="0.314cm" svg:width="17cm" svg:height="13.213cm" draw:z-index="0"><draw:image xlink:href="Pictures/10000001000002D30000023215689F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079cm" svg:y="0.051cm" svg:width="17cm" svg:height="7.99cm" draw:z-index="1"><draw:image xlink:href="Pictures/100000010000041D000001EF79FB50B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15:23.774252600</meta:creation-date>
    <dc:date>2025-09-30T10:00:50.651563900</dc:date>
    <meta:editing-duration>PT21M29S</meta:editing-duration>
    <meta:editing-cycles>1</meta:editing-cycles>
    <meta:document-statistic meta:table-count="0" meta:image-count="2" meta:object-count="0" meta:page-count="2" meta:paragraph-count="17" meta:word-count="18" meta:character-count="35" meta:non-whitespace-character-count="34"/>
    <meta:generator>LibreOffice/25.8.1.1$Windows_X86_64 LibreOffice_project/54047653041915e595ad4e45cccea684809c77b5</meta:generator>
  </office:meta>
</office:document-meta>
</file>