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6000000F09C9BB1A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407cm" style:rel-column-width="32410*"/>
    </style:style>
    <style:style style:name="Tabla2.B" style:family="table-column">
      <style:table-column-properties style:column-width="8.594cm" style:rel-column-width="3312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1ca2bf" officeooo:paragraph-rsid="001ca2bf" style:font-weight-asian="bold" style:font-weight-complex="bold"/>
    </style:style>
    <style:style style:name="P2" style:family="paragraph" style:parent-style-name="Standard">
      <style:text-properties fo:font-weight="normal" officeooo:rsid="001ca512" officeooo:paragraph-rsid="001ca512" style:font-weight-asian="normal" style:font-weight-complex="normal"/>
    </style:style>
    <style:style style:name="P3" style:family="paragraph" style:parent-style-name="Standard">
      <style:text-properties fo:font-weight="bold" officeooo:rsid="001ca512" officeooo:paragraph-rsid="001de8c9" style:font-weight-asian="bold" style:font-weight-complex="bold"/>
    </style:style>
    <style:style style:name="P4" style:family="paragraph" style:parent-style-name="Table_20_Contents">
      <style:text-properties fo:font-weight="bold" officeooo:rsid="001ca512" officeooo:paragraph-rsid="001de8c9" style:font-weight-asian="bold" style:font-weight-complex="bold"/>
    </style:style>
    <style:style style:name="P5" style:family="paragraph" style:parent-style-name="Table_20_Contents">
      <style:text-properties officeooo:rsid="001de8c9" officeooo:paragraph-rsid="001de8c9"/>
    </style:style>
    <style:style style:name="P6" style:family="paragraph" style:parent-style-name="Standard">
      <style:text-properties fo:font-weight="bold" officeooo:rsid="001ca2bf" officeooo:paragraph-rsid="001de8c9" style:font-weight-asian="bold" style:font-weight-complex="bold"/>
    </style:style>
    <style:style style:name="P7" style:family="paragraph" style:parent-style-name="Standard">
      <style:text-properties fo:font-weight="bold" officeooo:rsid="001ca512" officeooo:paragraph-rsid="001ca512" style:font-weight-asian="bold" style:font-weight-complex="bold"/>
    </style:style>
    <style:style style:name="P8" style:family="paragraph" style:parent-style-name="Table_20_Contents">
      <style:text-properties fo:font-weight="bold" officeooo:rsid="001de8c9" officeooo:paragraph-rsid="001de8c9" style:font-weight-asian="bold" style:font-weight-complex="bold"/>
    </style:style>
    <style:style style:name="P9" style:family="paragraph" style:parent-style-name="Table_20_Contents">
      <style:text-properties officeooo:paragraph-rsid="001de8c9"/>
    </style:style>
    <style:style style:name="P10" style:family="paragraph" style:parent-style-name="Standard">
      <style:text-properties fo:font-weight="normal" officeooo:rsid="00202a20" officeooo:paragraph-rsid="00202a20" style:font-weight-asian="normal" style:font-weight-complex="normal"/>
    </style:style>
    <style:style style:name="P11" style:family="paragraph" style:parent-style-name="Standard">
      <style:text-properties fo:font-weight="bold" officeooo:rsid="00212e41" officeooo:paragraph-rsid="00212e41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ca2bf" officeooo:paragraph-rsid="001ca2bf" style:font-weight-asian="bold" style:font-weight-complex="bold"/>
    </style:style>
    <style:style style:name="P13" style:family="paragraph" style:parent-style-name="Standard">
      <style:text-properties fo:font-weight="bold" officeooo:rsid="00202a20" officeooo:paragraph-rsid="00202a20" style:font-weight-asian="bold" style:font-weight-complex="bold"/>
    </style:style>
    <style:style style:name="T1" style:family="text">
      <style:text-properties officeooo:rsid="001de8c9"/>
    </style:style>
    <style:style style:name="T2" style:family="text">
      <style:text-properties officeooo:rsid="001ca512"/>
    </style:style>
    <style:style style:name="T3" style:family="text">
      <style:text-properties officeooo:rsid="00212e41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esechar las baterías en los puntos limpios es de vital importancia para la humanidad ya que pueden contaminar el medioambiente y, si se abandonan cerca de rios, pantanos o playas, contaminar el agua. UTILIZA LAS TIC. Busca informacion en internet sobre el impacto que pueden causar.</text:p>
      <text:p text:style-name="P2">Tirar baterias cerca de rios,pantanos,etc libera metales pesados toxicos como el mercurio,plomo y cadmio,que contaminan el agua,el suelo,etc. Esta contaminacion puede poner en riesgo a los animales de la zona y a los humanos ya que puedes ingerir esos peces,etc.</text:p>
      <text:p text:style-name="P1"/>
      <text:p text:style-name="P1">a) ¿Donde desecharias una fuente de alimentacion?</text:p>
      <text:p text:style-name="P2">En un punto limpio o un gestor de residuos electronicos autorizado.</text:p>
      <text:p text:style-name="P1"/>
      <text:p text:style-name="P1">b) ¿Que componentes pueden ser reutilizados?</text:p>
      <text:p text:style-name="P2">El transformador,el rectificador,el filtro y el regulador.</text:p>
      <text:p text:style-name="P1"/>
      <text:p text:style-name="P1">2. Tipo de fuentes (modulares y mas tipos)</text:p>
      <text:p text:style-name="P3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>Diseño</text:p>
          </table:table-cell>
          <table:table-cell table:style-name="Tabla1.A1" office:value-type="string">
            <text:p text:style-name="P4">Modularidad</text:p>
          </table:table-cell>
          <table:table-cell table:style-name="Tabla1.C1" office:value-type="string">
            <text:p text:style-name="P4">Fisico</text:p>
          </table:table-cell>
        </table:table-row>
        <table:table-row>
          <table:table-cell table:style-name="Tabla1.A2" office:value-type="string">
            <text:p text:style-name="P5">Linear</text:p>
          </table:table-cell>
          <table:table-cell table:style-name="Tabla1.A2" office:value-type="string">
            <text:p text:style-name="P5">Modular</text:p>
          </table:table-cell>
          <table:table-cell table:style-name="Tabla1.C2" office:value-type="string">
            <text:p text:style-name="P5">ATX</text:p>
          </table:table-cell>
        </table:table-row>
        <table:table-row>
          <table:table-cell table:style-name="Tabla1.A2" office:value-type="string">
            <text:p text:style-name="P5">Conmutada</text:p>
          </table:table-cell>
          <table:table-cell table:style-name="Tabla1.A2" office:value-type="string">
            <text:p text:style-name="P5">Semi-modular</text:p>
          </table:table-cell>
          <table:table-cell table:style-name="Tabla1.C2" office:value-type="string">
            <text:p text:style-name="P5">SFX</text:p>
          </table:table-cell>
        </table:table-row>
        <table:table-row>
          <table:table-cell table:style-name="Tabla1.A2" office:value-type="string">
            <text:p text:style-name="P5">Mixta</text:p>
          </table:table-cell>
          <table:table-cell table:style-name="Tabla1.A2" office:value-type="string">
            <text:p text:style-name="P5">No modular</text:p>
          </table:table-cell>
          <table:table-cell table:style-name="Tabla1.C2" office:value-type="string">
            <text:p text:style-name="P5">TFX</text:p>
          </table:table-cell>
        </table:table-row>
      </table:table>
      <text:p text:style-name="P6"/>
      <text:p text:style-name="P7">3. Clasificacion de las fuentes de alimentacion según su eficiencia y que es la eficencia en una fuente de alimentacion.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Tipo</text:p>
          </table:table-cell>
          <table:table-cell table:style-name="Tabla2.B1" office:value-type="string">
            <text:p text:style-name="P8">Eficiencia</text:p>
          </table:table-cell>
        </table:table-row>
        <table:table-row>
          <table:table-cell table:style-name="Tabla2.A2" office:value-type="string">
            <text:p text:style-name="Table_20_Contents">80+ White</text:p>
          </table:table-cell>
          <table:table-cell table:style-name="Tabla2.B2" office:value-type="string">
            <text:p text:style-name="Table_20_Contents">85%</text:p>
          </table:table-cell>
        </table:table-row>
        <table:table-row>
          <table:table-cell table:style-name="Tabla2.A2" office:value-type="string">
            <text:p text:style-name="P9">80+ <text:span text:style-name="T1">Bronze</text:span></text:p>
          </table:table-cell>
          <table:table-cell table:style-name="Tabla2.B2" office:value-type="string">
            <text:p text:style-name="Table_20_Contents">88%</text:p>
          </table:table-cell>
        </table:table-row>
        <table:table-row>
          <table:table-cell table:style-name="Tabla2.A2" office:value-type="string">
            <text:p text:style-name="P9">80+ <text:span text:style-name="T1">Silver</text:span></text:p>
          </table:table-cell>
          <table:table-cell table:style-name="Tabla2.B2" office:value-type="string">
            <text:p text:style-name="Table_20_Contents">90%</text:p>
          </table:table-cell>
        </table:table-row>
        <table:table-row>
          <table:table-cell table:style-name="Tabla2.A2" office:value-type="string">
            <text:p text:style-name="P9">80+ <text:span text:style-name="T1">Gold</text:span></text:p>
          </table:table-cell>
          <table:table-cell table:style-name="Tabla2.B2" office:value-type="string">
            <text:p text:style-name="Table_20_Contents">92%</text:p>
          </table:table-cell>
        </table:table-row>
        <table:table-row>
          <table:table-cell table:style-name="Tabla2.A2" office:value-type="string">
            <text:p text:style-name="P5">80+ Platinum</text:p>
          </table:table-cell>
          <table:table-cell table:style-name="Tabla2.B2" office:value-type="string">
            <text:p text:style-name="Table_20_Contents">94%</text:p>
          </table:table-cell>
        </table:table-row>
        <table:table-row>
          <table:table-cell table:style-name="Tabla2.A2" office:value-type="string">
            <text:p text:style-name="P5">80+ Titanium</text:p>
          </table:table-cell>
          <table:table-cell table:style-name="Tabla2.B2" office:value-type="string">
            <text:p text:style-name="Table_20_Contents">96%</text:p>
          </table:table-cell>
        </table:table-row>
      </table:table>
      <text:p text:style-name="P7"/>
      <text:p text:style-name="P10">La eficencia en la fuente de alimentacion es la manera en la que se mide en porcentaje la cantidad de energia que la fuente suministra al equipo y cuanta se pierde en la conversion.</text:p>
      <text:p text:style-name="P1"/>
      <text:p text:style-name="P1"><text:span text:style-name="T2">4. </text:span>Invest<draw:frame draw:style-name="fr1" draw:name="Imagen1" text:anchor-type="char" svg:x="1.462cm" svg:y="0.93cm" svg:width="14.552cm" svg:height="6.35cm" draw:z-index="0"><draw:image xlink:href="Pictures/1000000000000226000000F09C9BB1AD.png" xlink:type="simple" xlink:show="embed" xlink:actuate="onLoad" draw:mime-type="image/png"/></draw:frame>iga los datos que hay en la CPU a que hacen referenci<text:span text:style-name="T3">a</text:span></text:p>
      <text:p text:style-name="P11"><text:soft-page-break/>Processor Name:<text:span text:style-name="T4">El nombre del procesador</text:span></text:p>
      <text:p text:style-name="P11">Processor Number:<text:span text:style-name="T4">El modelo del procesador</text:span></text:p>
      <text:p text:style-name="P11">Spec Code / Processor Speed:<text:span text:style-name="T4">El identificador de ese modelo de procesador en concreto y la velocidad del procesador.</text:span></text:p>
      <text:p text:style-name="P11">Batch Number: <text:span text:style-name="T4">El numero de serie de ese procesador en concreto.</text:span></text:p>
      <text:p text:style-name="P1"/>
      <text:p text:style-name="P1"><text:span text:style-name="T2">5. </text:span>Buses actuales que encontramos en la placa base</text:p>
      <text:p text:style-name="P1"/>
      <text:p text:style-name="P12"/>
      <text:p text:style-name="P1"/>
      <text:p text:style-name="P13">6. Componentes y definicion de un disco:</text:p>
      <text:p text:style-name="P13"/>
      <text:p text:style-name="P13">a) HDD</text:p>
      <text:p text:style-name="P13">b) SSD</text:p>
      <text:p text:style-name="P13">c) Ventajas e Inconvenientes</text:p>
      <text:p text:style-name="P13">d) Tipos de conectores de cada tipo de disco</text:p>
      <text:p text:style-name="P13"/>
      <text:p text:style-name="P13">7. Tipos de tarjetas de memorias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11:43:29.177485300</meta:creation-date>
    <dc:date>2025-11-06T09:56:58.235032600</dc:date>
    <meta:editing-duration>PT36M58S</meta:editing-duration>
    <meta:editing-cycles>3</meta:editing-cycles>
    <meta:generator>LibreOffice/25.8.1.1$Windows_X86_64 LibreOffice_project/54047653041915e595ad4e45cccea684809c77b5</meta:generator>
    <meta:print-date>2025-11-06T09:56:47.581673300</meta:print-date>
    <meta:printed-by>Archivos PDF</meta:printed-by>
    <meta:document-statistic meta:table-count="2" meta:image-count="1" meta:object-count="0" meta:page-count="2" meta:paragraph-count="47" meta:word-count="304" meta:character-count="1810" meta:non-whitespace-character-count="1553"/>
  </office:meta>
</office:document-meta>
</file>