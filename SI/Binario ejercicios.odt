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D00000233859B36A4.png" manifest:media-type="image/png"/>
  <manifest:file-entry manifest:full-path="Pictures/10000001000002080000015FF85040FC.png" manifest:media-type="image/png"/>
  <manifest:file-entry manifest:full-path="Pictures/10000001000002200000016619105E6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23a"/>
    </style:style>
    <style:style style:name="P2" style:family="paragraph" style:parent-style-name="Standard">
      <style:text-properties style:text-underline-style="none" officeooo:rsid="000c2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85cm" svg:y="0.113cm" svg:width="17cm" svg:height="12.254cm" draw:z-index="0"><draw:image xlink:href="Pictures/100000010000030D00000233859B36A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4" text:anchor-type="char" svg:width="13.76cm" svg:height="9.289cm" draw:z-index="2"><draw:image xlink:href="Pictures/10000001000002080000015FF85040F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3" text:anchor-type="char" svg:x="1.356cm" svg:y="-0.203cm" svg:width="14.395cm" svg:height="9.474cm" draw:z-index="1"><draw:image xlink:href="Pictures/10000001000002200000016619105E6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09:25:21.673646600</meta:creation-date>
    <dc:date>2025-09-25T09:27:23.203528600</dc:date>
    <meta:editing-duration>PT2M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5.8.1.1$Windows_X86_64 LibreOffice_project/54047653041915e595ad4e45cccea684809c77b5</meta:generator>
  </office:meta>
</office:document-meta>
</file>