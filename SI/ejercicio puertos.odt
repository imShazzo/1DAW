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D3000000C22CA7247D.png" manifest:media-type="image/png"/>
  <manifest:file-entry manifest:full-path="Pictures/1000000100000125000000EDF7982EB5.png" manifest:media-type="image/png"/>
  <manifest:file-entry manifest:full-path="Pictures/10000001000001A6000000D2DF93D9F8.png" manifest:media-type="image/png"/>
  <manifest:file-entry manifest:full-path="Pictures/10000001000001AE0000011DFB5B013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1847a"/>
    </style:style>
    <style:style style:name="P2" style:family="paragraph" style:parent-style-name="Standard">
      <style:text-properties fo:font-weight="bold" officeooo:rsid="0011847a" officeooo:paragraph-rsid="0011847a" style:font-weight-asian="bold" style:font-weight-complex="bold"/>
    </style:style>
    <style:style style:name="P3" style:family="paragraph" style:parent-style-name="Standard">
      <style:text-properties fo:font-weight="bold" officeooo:rsid="00135d0f" officeooo:paragraph-rsid="00135d0f" style:font-weight-asian="bold" style:font-weight-complex="bold"/>
    </style:style>
    <style:style style:name="P4" style:family="paragraph" style:parent-style-name="Standard">
      <style:text-properties fo:font-weight="normal" officeooo:rsid="00135d0f" officeooo:paragraph-rsid="00135d0f" style:font-weight-asian="normal" style:font-weight-complex="normal"/>
    </style:style>
    <style:style style:name="P5" style:family="paragraph" style:parent-style-name="Standard">
      <style:text-properties fo:font-weight="bold" officeooo:rsid="00154a83" officeooo:paragraph-rsid="00154a83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5d0f" style:font-weight-asian="normal" style:font-weight-complex="normal"/>
    </style:style>
    <style:style style:name="T3" style:family="text">
      <style:text-properties fo:font-weight="normal" officeooo:rsid="00154a83" style:font-weight-asian="normal" style:font-weight-complex="normal"/>
    </style:style>
    <style:style style:name="T4" style:family="text">
      <style:text-properties fo:font-weight="normal" officeooo:rsid="0011847a" style:font-weight-asian="normal" style:font-weight-complex="normal"/>
    </style:style>
    <style:style style:name="T5" style:family="text">
      <style:text-properties fo:font-weight="normal" officeooo:rsid="0016b66f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.122cm" svg:y="0.21cm" svg:width="12.358cm" svg:height="5.133cm" draw:z-index="0"><draw:image xlink:href="Pictures/10000001000001D3000000C22CA7247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1-<text:span text:style-name="T1">PS2 </text:span><text:span text:style-name="T2">Teclado</text:span></text:p>
      <text:p text:style-name="P2">2-<text:span text:style-name="T1">SPDIF Out</text:span></text:p>
      <text:p text:style-name="P2">3-<text:span text:style-name="T1">VGA</text:span></text:p>
      <text:p text:style-name="P2">4-<text:span text:style-name="T1">USB 3.0</text:span></text:p>
      <text:p text:style-name="P2">5-<text:span text:style-name="T1">Ethernet</text:span></text:p>
      <text:p text:style-name="P2">6-<text:span text:style-name="T1">Salida estereo(Altavoces traseros)</text:span></text:p>
      <text:p text:style-name="P2">7-<text:span text:style-name="T1">Salida estereo(Altavoz central/subwoofer)</text:span></text:p>
      <text:p text:style-name="P2">8-<text:span text:style-name="T1">Entrada estereo(Capturadora de audio)</text:span></text:p>
      <text:p text:style-name="P2">9-<text:span text:style-name="T1">Salida estereo(Auriculares o altavoces)</text:span></text:p>
      <text:p text:style-name="P2">10-<text:span text:style-name="T1">Entrada mono(Microfono)</text:span></text:p>
      <text:p text:style-name="P2">11-<text:span text:style-name="T1">Salida estereo(Altavoces delanteros)</text:span></text:p>
      <text:p text:style-name="P2">12-<text:span text:style-name="T2">USB 2.0</text:span></text:p>
      <text:p text:style-name="P2">13-<text:span text:style-name="T2">E-Sata</text:span></text:p>
      <text:p text:style-name="P2">14-<text:span text:style-name="T2">DVI</text:span></text:p>
      <text:p text:style-name="P2">15-<text:span text:style-name="T2">HDMI</text:span></text:p>
      <text:p text:style-name="P2">16-<text:span text:style-name="T2">DisplayPort</text:span></text:p>
      <text:p text:style-name="P2">17-<text:span text:style-name="T2">USB 2.0</text:span></text:p>
      <text:p text:style-name="Standard"/>
      <text:p text:style-name="Standard"><draw:frame draw:style-name="fr1" draw:name="Imagen2" text:anchor-type="char" svg:x="0.062cm" svg:y="0.104cm" svg:width="7.752cm" svg:height="6.271cm" draw:z-index="1"><draw:image xlink:href="Pictures/1000000100000125000000EDF7982EB5.png" xlink:type="simple" xlink:show="embed" xlink:actuate="onLoad" draw:mime-type="image/png"/></draw:frame></text:p>
      <text:p text:style-name="P3">1-<text:span text:style-name="T1">VGA/Señal de video anal</text:span><text:span text:style-name="T1">ógica.</text:span></text:p>
      <text:p text:style-name="Standard"/>
      <text:p text:style-name="Standard"/>
      <text:p text:style-name="Standard"/>
      <text:p text:style-name="Standard"/>
      <text:p text:style-name="P3">2-<text:span text:style-name="T1">DVI/Señal dual doble (DVI-I DL)/Digital y</text:span></text:p>
      <text:p text:style-name="P4">analógíco.</text:p>
      <text:p text:style-name="Standard"/>
      <text:p text:style-name="Standard"/>
      <text:p text:style-name="Standard"/>
      <text:p text:style-name="P3">3-<text:span text:style-name="T1">HDMI/Tipo A/Video digital en alta definición y audio.</text:span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char" svg:x="0.039cm" svg:y="0cm" svg:width="11.165cm" svg:height="5.556cm" draw:z-index="2"><draw:image xlink:href="Pictures/10000001000001A6000000D2DF93D9F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3"><text:soft-page-break/>1-<text:span text:style-name="T1">PS2 Mouse</text:span></text:p>
      <text:p text:style-name="P3">2-<text:span text:style-name="T1">PS2 Teclado</text:span></text:p>
      <text:p text:style-name="P3">3-<text:span text:style-name="T1">Paralelo</text:span></text:p>
      <text:p text:style-name="P3">4-<text:span text:style-name="T1">VGA</text:span></text:p>
      <text:p text:style-name="P3">5-<text:span text:style-name="T1">USB 2.0</text:span></text:p>
      <text:p text:style-name="P3">6-<text:span text:style-name="T1">Ethernet</text:span></text:p>
      <text:p text:style-name="P3">7-<text:span text:style-name="T3">Entrada estereo(Capturadora de audio)</text:span></text:p>
      <text:p text:style-name="P3">8-<text:span text:style-name="T1">Salida estereo</text:span><text:span text:style-name="T3">(Auriculares/Altavoces)</text:span></text:p>
      <text:p text:style-name="P3">9-<text:span text:style-name="T3">Entrada mono(Microfono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4" text:anchor-type="char" svg:x="0.118cm" svg:y="0.199cm" svg:width="11.379cm" svg:height="7.541cm" draw:z-index="3"><draw:image xlink:href="Pictures/10000001000001AE0000011DFB5B013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1-<text:span text:style-name="T1">PS2 Mouse</text:span></text:p>
      <text:p text:style-name="P5">2-<text:span text:style-name="T1">USB 2.0</text:span></text:p>
      <text:p text:style-name="P5">3-<text:span text:style-name="T1">PS2 Teclado</text:span></text:p>
      <text:p text:style-name="P5">4-<text:span text:style-name="T1">Paralelo</text:span></text:p>
      <text:p text:style-name="P5">5-<text:span text:style-name="T1">Ethernet</text:span></text:p>
      <text:p text:style-name="P5">6-<text:span text:style-name="T1">Ethernet</text:span></text:p>
      <text:p text:style-name="P5">7-<text:span text:style-name="T1">Salida estereo(Altavoces delanteros)</text:span></text:p>
      <text:p text:style-name="P5">8-<text:span text:style-name="T4">Salida estereo(Altavoces traseros)</text:span></text:p>
      <text:p text:style-name="P5">9-<text:span text:style-name="T4">Entrada estereo(Capturadora de audio)</text:span></text:p>
      <text:p text:style-name="P5">10-<text:span text:style-name="T4">Salida estereo(Auriculares o altavoces)</text:span></text:p>
      <text:p text:style-name="P5">11-<text:span text:style-name="T5">RCA Video</text:span></text:p>
      <text:p text:style-name="P5">12-<text:span text:style-name="T1">SPDIF Out</text:span></text:p>
      <text:p text:style-name="P5">13-<text:span text:style-name="T5">Fireware</text:span></text:p>
      <text:p text:style-name="P5">14-<text:span text:style-name="T4">Salida estereo(Altavoz central/subwoofer)</text:span></text:p>
      <text:p text:style-name="P5">15-<text:span text:style-name="T1">Entrada mono(Microfono)</text:span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14:06:44.369945500</meta:creation-date>
    <dc:date>2025-11-25T09:50:53.515894500</dc:date>
    <meta:editing-duration>PT3M10S</meta:editing-duration>
    <meta:editing-cycles>2</meta:editing-cycles>
    <meta:generator>LibreOffice/25.8.1.1$Windows_X86_64 LibreOffice_project/54047653041915e595ad4e45cccea684809c77b5</meta:generator>
    <meta:document-statistic meta:table-count="0" meta:image-count="4" meta:object-count="0" meta:page-count="2" meta:paragraph-count="45" meta:word-count="104" meta:character-count="951" meta:non-whitespace-character-count="892"/>
  </office:meta>
</office:document-meta>
</file>