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1B000002AA4F9ECF25.png" manifest:media-type="image/png"/>
  <manifest:file-entry manifest:full-path="Pictures/10000001000003C20000023FAE5E7CD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7cm" svg:height="14.584cm" draw:z-index="0"><draw:image xlink:href="Pictures/100000010000031B000002AA4F9ECF25.png" xlink:type="simple" xlink:show="embed" xlink:actuate="onLoad" draw:mime-type="image/png"/></draw:frame><draw:frame draw:style-name="fr1" draw:name="Imagen2" text:anchor-type="char" svg:width="17cm" svg:height="10.16cm" draw:z-index="1"><draw:image xlink:href="Pictures/10000001000003C20000023FAE5E7CD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1T09:55:26.885170900</meta:creation-date>
    <dc:date>2025-12-11T09:58:20.774095000</dc:date>
    <meta:editing-duration>PT2M55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25.8.1.1$Windows_X86_64 LibreOffice_project/54047653041915e595ad4e45cccea684809c77b5</meta:generator>
  </office:meta>
</office:document-meta>
</file>