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050000024EDA9FEBC8.png" manifest:media-type="image/png"/>
  <manifest:file-entry manifest:full-path="Pictures/10000000000002D4000002405D7AE4D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07d74" officeooo:paragraph-rsid="00207d74"/>
    </style:style>
    <style:style style:name="P2" style:family="paragraph" style:parent-style-name="Standard">
      <style:text-properties officeooo:rsid="0021b189" officeooo:paragraph-rsid="0021b189"/>
    </style:style>
    <style:style style:name="T1" style:family="text">
      <style:text-properties officeooo:rsid="0021b189"/>
    </style:style>
    <style:style style:name="T2" style:family="text">
      <style:text-properties officeooo:rsid="0025a7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2" text:anchor-type="paragraph" svg:width="17cm" svg:height="12.973cm" draw:z-index="1"><draw:image xlink:href="Pictures/10000001000003050000024EDA9FEBC8.png" xlink:type="simple" xlink:show="embed" xlink:actuate="onLoad" draw:mime-type="image/png"/></draw:frame>1:USB/Conectores de la placa</text:p>
      <text:p text:style-name="P1">2:Socket de la CPU</text:p>
      <text:p text:style-name="P1">3:<text:span text:style-name="T1">Socket</text:span> RAM</text:p>
      <text:p text:style-name="P1">4:Chipset puente norte</text:p>
      <text:p text:style-name="P1">5:Chipset puente sur</text:p>
      <text:p text:style-name="P1">6:Conector ATX 24 pines</text:p>
      <text:p text:style-name="P1">7:Conectores SATA</text:p>
      <text:p text:style-name="P1">8:Conectores panel frontal</text:p>
      <text:p text:style-name="P1">9:Pila</text:p>
      <text:p text:style-name="P1">10:Conectores PCI</text:p>
      <text:p text:style-name="P1">11:Conectores PCIex16</text:p>
      <text:p text:style-name="P1">12:Conectores PCIex1</text:p>
      <text:p text:style-name="P1">13:Conector CPU 12V</text:p>
      <text:p text:style-name="P1">14:<text:span text:style-name="T1">Anclaje d</text:span>isipador CPU</text:p>
      <text:p text:style-name="P1">15:BIOS</text:p>
      <text:p text:style-name="P1">16:Conectores USB</text:p>
      <text:p text:style-name="P1">17:<text:span text:style-name="T1">Conector paralelo</text:span></text:p>
      <text:p text:style-name="P1">18:<text:span text:style-name="T1">Conector para ventiladores</text:span></text:p>
      <text:p text:style-name="P1">19:Puerto IDE</text:p>
      <text:p text:style-name="P1">20:<text:span text:style-name="T1">Conector Floppy</text:span></text:p>
      <text:p text:style-name="Standard"/>
      <text:p text:style-name="Standard"/>
      <text:p text:style-name="P2"><draw:frame draw:style-name="fr2" draw:name="Imagen1" text:anchor-type="paragraph" svg:x="0.095cm" svg:y="0.474cm" svg:width="17cm" svg:height="13.524cm" draw:z-index="0"><draw:image xlink:href="Pictures/10000000000002D4000002405D7AE4D6.png" xlink:type="simple" xlink:show="embed" xlink:actuate="onLoad" draw:mime-type="image/png"/></draw:frame><text:soft-page-break/>1:Socket CPU</text:p>
      <text:p text:style-name="P2">2:<text:span text:style-name="T2">SW1</text:span></text:p>
      <text:p text:style-name="P2">3:<text:span text:style-name="T2">SW2</text:span></text:p>
      <text:p text:style-name="P2">4:Conector ATX 20 pines</text:p>
      <text:p text:style-name="P2">5:Socket RAM</text:p>
      <text:p text:style-name="P2">6:<text:span text:style-name="T2">IDE</text:span></text:p>
      <text:p text:style-name="P2">7:<text:span text:style-name="T2">IDE</text:span></text:p>
      <text:p text:style-name="P2">8:Pila</text:p>
      <text:p text:style-name="P2">9:<text:span text:style-name="T2">CPU Fan</text:span></text:p>
      <text:p text:style-name="P2">10:<text:span text:style-name="T2">USB</text:span></text:p>
      <text:p text:style-name="P2">11:<text:span text:style-name="T2">USB</text:span></text:p>
      <text:p text:style-name="P2">12:Conector <text:span text:style-name="T2">CNR</text:span></text:p>
      <text:p text:style-name="P2">13:BIOS</text:p>
      <text:p text:style-name="P2">14:Conector PCI</text:p>
      <text:p text:style-name="P2">15:Conector <text:span text:style-name="T2">AGP</text:span></text:p>
      <text:p text:style-name="P2">16:<text:span text:style-name="T2">Midi</text:span></text:p>
      <text:p text:style-name="P2">17:<text:span text:style-name="T2">Puerto Paralelo</text:span></text:p>
      <text:p text:style-name="P2">18:Puerto USB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28T11:41:20.789000000</meta:creation-date>
    <dc:date>2025-10-22T11:57:33.582915500</dc:date>
    <meta:editing-duration>PT37M9S</meta:editing-duration>
    <meta:editing-cycles>3</meta:editing-cycles>
    <meta:generator>LibreOffice/25.8.1.1$Windows_X86_64 LibreOffice_project/54047653041915e595ad4e45cccea684809c77b5</meta:generator>
    <meta:document-statistic meta:table-count="0" meta:image-count="2" meta:object-count="0" meta:page-count="2" meta:paragraph-count="38" meta:word-count="79" meta:character-count="561" meta:non-whitespace-character-count="520"/>
  </office:meta>
</office:document-meta>
</file>