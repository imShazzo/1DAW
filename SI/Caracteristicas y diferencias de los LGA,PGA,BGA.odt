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E8000002126FE16171.png" manifest:media-type="image/png"/>
  <manifest:file-entry manifest:full-path="Pictures/10000000000002F900000227DDAB7FB5.png" manifest:media-type="image/png"/>
  <manifest:file-entry manifest:full-path="Pictures/10000000000003E8000003E88D1C0B28.png" manifest:media-type="image/png"/>
  <manifest:file-entry manifest:full-path="Pictures/10000000000003E8000002EE2D5E07D7.png" manifest:media-type="image/png"/>
  <manifest:file-entry manifest:full-path="Pictures/10000000000001E000000219D3A4945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fo:background-color="#f7f7f7">
        <style:background-image/>
      </style:table-properties>
    </style:style>
    <style:style style:name="Tabla1.A" style:family="table-column">
      <style:table-column-properties style:column-width="2.891cm"/>
    </style:style>
    <style:style style:name="Tabla1.B" style:family="table-column">
      <style:table-column-properties style:column-width="3.443cm"/>
    </style:style>
    <style:style style:name="Tabla1.C" style:family="table-column">
      <style:table-column-properties style:column-width="3.561cm"/>
    </style:style>
    <style:style style:name="Tabla1.D" style:family="table-column">
      <style:table-column-properties style:column-width="7.105cm"/>
    </style:style>
    <style:style style:name="Tabla1.A1" style:family="table-cell">
      <style:table-cell-properties style:vertical-align="middle" fo:background-color="#e3b53b" fo:padding-left="0cm" fo:padding-right="0cm" fo:padding-top="0cm" fo:padding-bottom="0.318cm" fo:border-left="none" fo:border-right="none" fo:border-top="none" fo:border-bottom="0.05pt solid #dddddd">
        <style:background-image/>
      </style:table-cell-properties>
    </style:style>
    <style:style style:name="Tabla1.A2" style:family="table-cell">
      <style:table-cell-properties style:vertical-align="middle" fo:padding-left="0cm" fo:padding-right="0cm" fo:padding-top="0cm" fo:padding-bottom="0.318cm" fo:border-left="none" fo:border-right="none" fo:border-top="none" fo:border-bottom="0.05pt solid #dddddd"/>
    </style:style>
    <style:style style:name="Tabla1.B2" style:family="table-cell">
      <style:table-cell-properties style:vertical-align="middle" fo:padding-left="0cm" fo:padding-right="0cm" fo:padding-top="0cm" fo:padding-bottom="0.318cm" fo:border-left="none" fo:border-right="none" fo:border-top="none" fo:border-bottom="0.05pt solid #dddddd"/>
    </style:style>
    <style:style style:name="Tabla1.C2" style:family="table-cell">
      <style:table-cell-properties style:vertical-align="middle" fo:padding-left="0cm" fo:padding-right="0cm" fo:padding-top="0cm" fo:padding-bottom="0.318cm" fo:border-left="none" fo:border-right="none" fo:border-top="none" fo:border-bottom="0.05pt solid #dddddd"/>
    </style:style>
    <style:style style:name="Tabla1.D2" style:family="table-cell">
      <style:table-cell-properties style:vertical-align="middle" fo:padding-left="0cm" fo:padding-right="0cm" fo:padding-top="0cm" fo:padding-bottom="0.318cm" fo:border-left="none" fo:border-right="none" fo:border-top="none" fo:border-bottom="0.05pt solid #dddddd"/>
    </style:style>
    <style:style style:name="Tabla1.A3" style:family="table-cell">
      <style:table-cell-properties style:vertical-align="middle" fo:padding-left="0cm" fo:padding-right="0cm" fo:padding-top="0cm" fo:padding-bottom="0.318cm" fo:border-left="none" fo:border-right="none" fo:border-top="none" fo:border-bottom="0.05pt solid #dddddd"/>
    </style:style>
    <style:style style:name="Tabla1.B3" style:family="table-cell">
      <style:table-cell-properties style:vertical-align="middle" fo:padding-left="0cm" fo:padding-right="0cm" fo:padding-top="0cm" fo:padding-bottom="0.318cm" fo:border-left="none" fo:border-right="none" fo:border-top="none" fo:border-bottom="0.05pt solid #dddddd"/>
    </style:style>
    <style:style style:name="Tabla1.C3" style:family="table-cell">
      <style:table-cell-properties style:vertical-align="middle" fo:padding-left="0cm" fo:padding-right="0cm" fo:padding-top="0cm" fo:padding-bottom="0.318cm" fo:border-left="none" fo:border-right="none" fo:border-top="none" fo:border-bottom="0.05pt solid #dddddd"/>
    </style:style>
    <style:style style:name="Tabla1.D3" style:family="table-cell">
      <style:table-cell-properties style:vertical-align="middle" fo:padding-left="0cm" fo:padding-right="0cm" fo:padding-top="0cm" fo:padding-bottom="0.318cm" fo:border-left="none" fo:border-right="none" fo:border-top="none" fo:border-bottom="0.05pt solid #dddddd"/>
    </style:style>
    <style:style style:name="Tabla1.A4" style:family="table-cell">
      <style:table-cell-properties style:vertical-align="middle" fo:padding-left="0cm" fo:padding-right="0cm" fo:padding-top="0cm" fo:padding-bottom="0.318cm" fo:border-left="none" fo:border-right="none" fo:border-top="none" fo:border-bottom="0.05pt solid #dddddd"/>
    </style:style>
    <style:style style:name="Tabla1.B4" style:family="table-cell">
      <style:table-cell-properties style:vertical-align="middle" fo:padding-left="0cm" fo:padding-right="0cm" fo:padding-top="0cm" fo:padding-bottom="0.318cm" fo:border-left="none" fo:border-right="none" fo:border-top="none" fo:border-bottom="0.05pt solid #dddddd"/>
    </style:style>
    <style:style style:name="Tabla1.C4" style:family="table-cell">
      <style:table-cell-properties style:vertical-align="middle" fo:padding-left="0cm" fo:padding-right="0cm" fo:padding-top="0cm" fo:padding-bottom="0.318cm" fo:border-left="none" fo:border-right="none" fo:border-top="none" fo:border-bottom="0.05pt solid #dddddd"/>
    </style:style>
    <style:style style:name="Tabla1.D4" style:family="table-cell">
      <style:table-cell-properties style:vertical-align="middle" fo:padding-left="0cm" fo:padding-right="0cm" fo:padding-top="0cm" fo:padding-bottom="0.318cm" fo:border-left="none" fo:border-right="none" fo:border-top="none" fo:border-bottom="0.05pt solid #dddddd"/>
    </style:style>
    <style:style style:name="Tabla1.A5" style:family="table-cell">
      <style:table-cell-properties style:vertical-align="middle" fo:padding-left="0cm" fo:padding-right="0cm" fo:padding-top="0cm" fo:padding-bottom="0.318cm" fo:border-left="none" fo:border-right="none" fo:border-top="none" fo:border-bottom="0.05pt solid #dddddd"/>
    </style:style>
    <style:style style:name="Tabla1.B5" style:family="table-cell">
      <style:table-cell-properties style:vertical-align="middle" fo:padding-left="0cm" fo:padding-right="0cm" fo:padding-top="0cm" fo:padding-bottom="0.318cm" fo:border-left="none" fo:border-right="none" fo:border-top="none" fo:border-bottom="0.05pt solid #dddddd"/>
    </style:style>
    <style:style style:name="Tabla1.C5" style:family="table-cell">
      <style:table-cell-properties style:vertical-align="middle" fo:padding-left="0cm" fo:padding-right="0cm" fo:padding-top="0cm" fo:padding-bottom="0.318cm" fo:border-left="none" fo:border-right="none" fo:border-top="none" fo:border-bottom="0.05pt solid #dddddd"/>
    </style:style>
    <style:style style:name="Tabla1.D5" style:family="table-cell">
      <style:table-cell-properties style:vertical-align="middle" fo:padding-left="0cm" fo:padding-right="0cm" fo:padding-top="0cm" fo:padding-bottom="0.318cm" fo:border-left="none" fo:border-right="none" fo:border-top="none" fo:border-bottom="0.05pt solid #dddddd"/>
    </style:style>
    <style:style style:name="Tabla1.A6" style:family="table-cell">
      <style:table-cell-properties style:vertical-align="middle" fo:padding-left="0cm" fo:padding-right="0cm" fo:padding-top="0cm" fo:padding-bottom="0.318cm" fo:border-left="none" fo:border-right="none" fo:border-top="none" fo:border-bottom="0.05pt solid #dddddd"/>
    </style:style>
    <style:style style:name="Tabla1.B6" style:family="table-cell">
      <style:table-cell-properties style:vertical-align="middle" fo:padding-left="0cm" fo:padding-right="0cm" fo:padding-top="0cm" fo:padding-bottom="0.318cm" fo:border-left="none" fo:border-right="none" fo:border-top="none" fo:border-bottom="0.05pt solid #dddddd"/>
    </style:style>
    <style:style style:name="Tabla1.C6" style:family="table-cell">
      <style:table-cell-properties style:vertical-align="middle" fo:padding-left="0cm" fo:padding-right="0cm" fo:padding-top="0cm" fo:padding-bottom="0.318cm" fo:border-left="none" fo:border-right="none" fo:border-top="none" fo:border-bottom="0.05pt solid #dddddd"/>
    </style:style>
    <style:style style:name="Tabla1.D6" style:family="table-cell">
      <style:table-cell-properties style:vertical-align="middle" fo:padding-left="0cm" fo:padding-right="0cm" fo:padding-top="0cm" fo:padding-bottom="0.318cm" fo:border-left="none" fo:border-right="none" fo:border-top="none" fo:border-bottom="0.05pt solid #dddddd"/>
    </style:style>
    <style:style style:name="Tabla1.A7" style:family="table-cell">
      <style:table-cell-properties style:vertical-align="middle" fo:padding="0cm" fo:border="none"/>
    </style:style>
    <style:style style:name="Tabla1.B7" style:family="table-cell">
      <style:table-cell-properties style:vertical-align="middle" fo:padding="0cm" fo:border="none"/>
    </style:style>
    <style:style style:name="Tabla1.C7" style:family="table-cell">
      <style:table-cell-properties style:vertical-align="middle" fo:padding="0cm" fo:border="none"/>
    </style:style>
    <style:style style:name="Tabla1.D7" style:family="table-cell">
      <style:table-cell-properties style:vertical-align="middle" fo:padding="0cm" fo:border="none"/>
    </style:style>
    <style:style style:name="P1" style:family="paragraph" style:parent-style-name="Standard">
      <style:text-properties fo:font-weight="bold" officeooo:rsid="000d1440" officeooo:paragraph-rsid="000d1440" style:font-weight-asian="bold" style:font-weight-complex="bold"/>
    </style:style>
    <style:style style:name="P2" style:family="paragraph" style:parent-style-name="Standard">
      <style:text-properties fo:font-weight="normal" officeooo:rsid="000d1440" officeooo:paragraph-rsid="000d1440" style:font-weight-asian="normal" style:font-weight-complex="normal"/>
    </style:style>
    <style:style style:name="P3"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color="#ffffff" loext:opacity="100%"/>
    </style:style>
    <style:style style:name="P4" style:family="paragraph" style:parent-style-name="Table_20_Contents">
      <style:paragraph-properties fo:margin-left="0cm" fo:margin-right="0cm" fo:margin-top="0cm" fo:margin-bottom="0cm" style:contextual-spacing="false" fo:text-indent="0cm" style:auto-text-indent="false"/>
      <style:text-properties fo:font-size="12pt"/>
    </style:style>
    <style:style style:name="P5" style:family="paragraph" style:parent-style-name="Table_20_Contents">
      <style:paragraph-properties fo:margin-left="0cm" fo:margin-right="0cm" fo:margin-top="0cm" fo:margin-bottom="0cm" style:contextual-spacing="false"/>
      <style:text-properties fo:font-size="12pt"/>
    </style:style>
    <style:style style:name="P6" style:family="paragraph" style:parent-style-name="Standard">
      <style:text-properties fo:font-weight="normal" officeooo:rsid="000d1440" officeooo:paragraph-rsid="000e65d3" style:font-weight-asian="normal" style:font-weight-complex="normal"/>
    </style:style>
    <style:style style:name="P7" style:family="paragraph" style:parent-style-name="Standard">
      <style:text-properties fo:font-weight="normal" officeooo:rsid="000e65d3" officeooo:paragraph-rsid="000e65d3" style:font-weight-asian="normal" style:font-weight-complex="normal"/>
    </style:style>
    <style:style style:name="T1" style:family="text">
      <style:text-properties officeooo:rsid="000e65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so caracteristicas y diferencia de los: LGA, PGA, BGA.</text:p>
      <text:p text:style-name="P1"/>
      <text:p text:style-name="P1">Caracteristicas LGA</text:p>
      <text:p text:style-name="P1"/>
      <text:p text:style-name="P2">Diseño de socket utilizado principalmente en los procesadores de Intel que se caracteriza porque los pines sobresalen de la placa base. El procesador, por otro lado, presenta una superficie plana con contactos que coinciden con el diseño de los pines del socket de la placa base. Así que cuando tenemos una CPU compatible con ese tipo de conector y lo ponemos, ambos encajan perfectamente y no existe manera de conectarlo de una manera distinta ya que de las cuatro esquinas, hay una con una forma muy particular que impide que lo situemos de otra forma.</text:p>
      <text:p text:style-name="P1"/>
      <text:p text:style-name="P1">-Ventajas de LGA</text:p>
      <text:p text:style-name="P2">-Tiene pines más pequeños con respecto a otros diseños, haciendo que la altura sea algo menor.</text:p>
      <text:p text:style-name="P2">-Ofrece mayor resistencia, ya que es más difícil doblar los pines al no estar en el procesador.</text:p>
      <text:p text:style-name="P2">-La instalación es bastante más sencilla, por el hecho de que simplemente debemos «dejar» caer el procesador en la posición correcta.</text:p>
      <text:p text:style-name="P1"/>
      <text:p text:style-name="P1">-Inconvenientes de LGA</text:p>
      <text:p text:style-name="P2">-Si se daña uno de los pines, es necesario cambiar la placa base entera, puesto que la reparación es muy complicada</text:p>
      <text:p text:style-name="P2"><draw:frame draw:style-name="fr1" draw:name="Imagen1" text:anchor-type="char" svg:x="0.152cm" svg:y="0.342cm" svg:width="17cm" svg:height="9.01cm" draw:z-index="0"><draw:image xlink:href="Pictures/10000000000003E8000002126FE16171.png" xlink:type="simple" xlink:show="embed" xlink:actuate="onLoad" draw:mime-type="image/png"/></draw:frame></text:p>
      <text:p text:style-name="P1">Caracteristicas PGA</text:p>
      <text:p text:style-name="P2">Podríamos decir que es el diseño opuesto a LGA y era usado, mayormente, en los procesadores AMD. El socket, en el caso de los PGA, es quien tiene los contactos y el procesador tiene los pines de conexión. Como pasa con LGA, la cantidad de pines y su disposición puede variar entre generaciones de procesadores. A partir del socket AM5 AMD optó por utilizar el socket LGA.</text:p>
      <text:p text:style-name="P1"/>
      <text:p text:style-name="P1">Ventajas de PGA</text:p>
      <text:p text:style-name="P2">-Es muy difícil que el socket de la placa base sufra daños.</text:p>
      <text:p text:style-name="P2">-Ofrece mejor reparabilidad.</text:p>
      <text:p text:style-name="P2"/>
      <text:p text:style-name="P1">Inconvenientes de PGA</text:p>
      <text:p text:style-name="P2"><text:soft-page-break/>-Al estar los pines en el procesador, es bastante común que se doblen, aunque con cuidado se puede -arreglar el problema.</text:p>
      <text:p text:style-name="P2">-Suelen tener una altura un poco superior al diseño LGA por la longitud de los pines.</text:p>
      <text:p text:style-name="P2">-Requiere de un poco más de cuidado en la instalación.</text:p>
      <text:p text:style-name="P2"/>
      <text:p text:style-name="P1"><draw:frame draw:style-name="fr2" draw:name="Imagen2" text:anchor-type="char" svg:width="17cm" svg:height="12.308cm" draw:z-index="1"><draw:image xlink:href="Pictures/10000000000002F900000227DDAB7FB5.png" xlink:type="simple" xlink:show="embed" xlink:actuate="onLoad" draw:mime-type="image/png"/></draw:frame></text:p>
      <text:p text:style-name="P1">Caracteristicas BGA</text:p>
      <text:p text:style-name="P2">Este tipo de zócalo difiere del resto en bastante, ya que aquí el montaje no es sobre un soporte, sino sobre la propia placa base. Aquí el procesador tiene unas pequeñas bolas de estaño que coinciden con el patrón de contactos serigrafiados en la placa base. Dichas bolas son, normalmente, de estaño y hacen que el procesador se «pegue» a la placa base a través de soldadura, por lo que los sistemas que utilizan este tipo de conexión no se pueden actualizar reemplazando el chip a no ser que realicemos un reballing.</text:p>
      <text:p text:style-name="P2"/>
      <text:p text:style-name="P1">Ventajas de BGA</text:p>
      <text:p text:style-name="P2">-Los procesadores basados en este diseño ocupan muy poco espacio, algo que implica una reducción de la potencia final del chip.</text:p>
      <text:p text:style-name="P2">-Como la longitud del contacto se reduce, baja la impedancia y, por consiguiente, aumenta la eficiencia.</text:p>
      <text:p text:style-name="P2">-Se pueden cambiar las pequeñas bolas de contacto cuando estas se desgastan con el tiempo.</text:p>
      <text:p text:style-name="P2">-Permite reducir el tamaño del sistema (portátiles, móviles, etc.) porque se elimina el soporte de instalación necesario en los dos casos anteriores, que provocaría que el dispositivo aumentara el grosor en hasta varios centímetros.</text:p>
      <text:p text:style-name="P2">-Al reducirse la potencia, también se reduce la generación del calor. Debemos destacar que en estos sistemas la disipación del calor suele ser más eficiente.</text:p>
      <text:p text:style-name="P2"/>
      <text:p text:style-name="P2"/>
      <text:p text:style-name="P1"><text:soft-page-break/>Desventajas del estándar BGA</text:p>
      <text:p text:style-name="P2">-Para «pegar» el procesador a la placa base se requiere usar tecnología avanzada y costosa.</text:p>
      <text:p text:style-name="P2">-La reparación es bastante complicada, ya que el proceso de retirar el procesador requiere de equipo especializado y amplios conocimientos.</text:p>
      <text:p text:style-name="P2">-Se debe verificar siempre la soldadura, algo que se realiza mediante rayos X, algo no accesible al usuario medio.</text:p>
      <text:p text:style-name="P2">-Solamente funcionan en circuitos multicapa, lo que limita las aplicaciones.</text:p>
      <text:p text:style-name="P2"><draw:frame draw:style-name="fr2" draw:name="Imagen3" text:anchor-type="char" svg:width="17cm" svg:height="12.749cm" draw:z-index="2"><draw:image xlink:href="Pictures/10000000000003E8000002EE2D5E07D7.png" xlink:type="simple" xlink:show="embed" xlink:actuate="onLoad" draw:mime-type="image/png"/></draw:frame></text:p>
      <text:p text:style-name="P1">Diferencias<text:bookmark text:name="tablepress-1080-no-5"/></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3"> </text:p>
            </table:table-cell>
            <table:table-cell table:style-name="Tabla1.A1" office:value-type="string">
              <text:p text:style-name="P3">Socket LGA</text:p>
            </table:table-cell>
            <table:table-cell table:style-name="Tabla1.A1" office:value-type="string">
              <text:p text:style-name="P3">Socket PGA</text:p>
            </table:table-cell>
            <table:table-cell table:style-name="Tabla1.A1" office:value-type="string">
              <text:p text:style-name="P3">Socket BGA</text:p>
            </table:table-cell>
          </table:table-row>
        </table:table-header-rows>
        <table:table-row>
          <table:table-cell table:style-name="Tabla1.A2" office:value-type="string">
            <text:p text:style-name="P4">Usado por</text:p>
          </table:table-cell>
          <table:table-cell table:style-name="Tabla1.B2" office:value-type="string">
            <text:p text:style-name="P4">Intel</text:p>
          </table:table-cell>
          <table:table-cell table:style-name="Tabla1.C2" office:value-type="string">
            <text:p text:style-name="P4">AMD</text:p>
          </table:table-cell>
          <table:table-cell table:style-name="Tabla1.D2" office:value-type="string">
            <text:p text:style-name="P4">Intel, AMD, NVIDIA, Qualcomm, Samsung y cualquier fabricante de smartphone, tabletas y otros dispositivos</text:p>
          </table:table-cell>
        </table:table-row>
        <table:table-row>
          <table:table-cell table:style-name="Tabla1.A3" office:value-type="string">
            <text:p text:style-name="P4">Calidad de construcción</text:p>
          </table:table-cell>
          <table:table-cell table:style-name="Tabla1.B3" office:value-type="string">
            <text:p text:style-name="P4">Poco frágil</text:p>
          </table:table-cell>
          <table:table-cell table:style-name="Tabla1.C3" office:value-type="string">
            <text:p text:style-name="P4">Más frágil</text:p>
          </table:table-cell>
          <table:table-cell table:style-name="Tabla1.D3" office:value-type="string">
            <text:p text:style-name="P4">Muy resistente</text:p>
          </table:table-cell>
        </table:table-row>
        <table:table-row>
          <table:table-cell table:style-name="Tabla1.A4" office:value-type="string">
            <text:p text:style-name="P4">Durabilidad</text:p>
          </table:table-cell>
          <table:table-cell table:style-name="Tabla1.B4" office:value-type="string">
            <text:p text:style-name="P4">Aumenta la durabilidad del procesador</text:p>
          </table:table-cell>
          <table:table-cell table:style-name="Tabla1.C4" office:value-type="string">
            <text:p text:style-name="P4">Aumenta la durabilidad de la placa base</text:p>
          </table:table-cell>
          <table:table-cell table:style-name="Tabla1.D4" office:value-type="string">
            <text:p text:style-name="P4">El punto habitual de fallo está en las bolas que "pegan" la CPU y placa base</text:p>
          </table:table-cell>
        </table:table-row>
        <table:table-row>
          <table:table-cell table:style-name="Tabla1.A5" office:value-type="string">
            <text:p text:style-name="P4">Eficiencia espacial</text:p>
          </table:table-cell>
          <table:table-cell table:style-name="Tabla1.B5" office:value-type="string">
            <text:p text:style-name="P4">Alta</text:p>
          </table:table-cell>
          <table:table-cell table:style-name="Tabla1.C5" office:value-type="string">
            <text:p text:style-name="P4">Media</text:p>
          </table:table-cell>
          <table:table-cell table:style-name="Tabla1.D5" office:value-type="string">
            <text:p text:style-name="P4">Muy alta</text:p>
          </table:table-cell>
        </table:table-row>
        <table:table-row>
          <table:table-cell table:style-name="Tabla1.A6" office:value-type="string">
            <text:p text:style-name="P4">Instalación</text:p>
          </table:table-cell>
          <table:table-cell table:style-name="Tabla1.B6" office:value-type="string">
            <text:p text:style-name="P4">Sencillo</text:p>
          </table:table-cell>
          <table:table-cell table:style-name="Tabla1.C6" office:value-type="string">
            <text:p text:style-name="P4">Ligeramente complicado</text:p>
          </table:table-cell>
          <table:table-cell table:style-name="Tabla1.D6" office:value-type="string">
            <text:p text:style-name="P4">Bastante complicado</text:p>
          </table:table-cell>
        </table:table-row>
        <text:soft-page-break/>
        <table:table-row>
          <table:table-cell table:style-name="Tabla1.A7" office:value-type="string">
            <text:p text:style-name="P4">Reparación</text:p>
          </table:table-cell>
          <table:table-cell table:style-name="Tabla1.B7" office:value-type="string">
            <text:p text:style-name="P4">Deberíamos cambiar la placa base</text:p>
          </table:table-cell>
          <table:table-cell table:style-name="Tabla1.C7" office:value-type="string">
            <text:p text:style-name="P4">Debemos cambiar el procesador</text:p>
          </table:table-cell>
          <table:table-cell table:style-name="Tabla1.D7" office:value-type="string">
            <text:p text:style-name="P5">Muy difícil, ya que requiere de maquinaria y conocimientos específicos</text:p>
          </table:table-cell>
        </table:table-row>
      </table:table>
      <text:p text:style-name="P1"/>
      <text:p text:style-name="P1"/>
      <text:p text:style-name="P1">Número de pines e imagen de memorias DIMM y SO-DIMM</text:p>
      <text:p text:style-name="P6"><text:span text:style-name="T1">L</text:span>as memorias DIMM varían en número de pines según el estándar DDR:</text:p>
      <text:p text:style-name="P6"><text:span text:style-name="T1">-DDR</text:span> 1<text:span text:style-name="T1">84</text:span> pines</text:p>
      <text:p text:style-name="P6"><text:span text:style-name="T1">-DDR2 /DDR3</text:span> 240 pines</text:p>
      <text:p text:style-name="P6"><text:span text:style-name="T1">-DDR4/DDR5</text:span> 288 pines</text:p>
      <text:p text:style-name="P6">mientras que las SO-DIMM (para portátiles) son más compactas y tienen menos pines, típicamente: </text:p>
      <text:p text:style-name="P6"><text:span text:style-name="T1">-DDR/DDR2 </text:span>200 pines</text:p>
      <text:p text:style-name="P6"><text:span text:style-name="T1">-DDR3 </text:span>204 pines</text:p>
      <text:p text:style-name="P7">-DDR4 260</text:p>
      <text:p text:style-name="P6"><text:span text:style-name="T1">-DDR5 </text:span>26<text:span text:style-name="T1">2</text:span> pines, </text:p>
      <text:p text:style-name="P6">dependiendo de la generación DDR. La diferencia principal es el tamaño y el uso: DIMM para ordenadores de sobremesa y SO-DIMM para dispositivos más pequeños como portátiles. </text:p>
      <text:p text:style-name="P6"/>
      <text:p text:style-name="P6"/>
      <text:p text:style-name="P6"><draw:frame draw:style-name="fr1" draw:name="Imagen5" text:anchor-type="char" svg:x="2.695cm" svg:y="0.009cm" svg:width="11.823cm" svg:height="11.823cm" draw:z-index="4"><draw:image xlink:href="Pictures/10000000000003E8000003E88D1C0B28.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n4" text:anchor-type="char" svg:x="1.653cm" svg:y="-1.169cm" svg:width="12.7cm" svg:height="14.208cm" draw:z-index="3"><draw:image xlink:href="Pictures/10000000000001E000000219D3A49455.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3:48:10.476154300</meta:creation-date>
    <dc:date>2025-10-27T14:12:02.708019200</dc:date>
    <meta:editing-duration>PT9M4S</meta:editing-duration>
    <meta:editing-cycles>1</meta:editing-cycles>
    <meta:document-statistic meta:table-count="1" meta:image-count="5" meta:object-count="0" meta:page-count="5" meta:paragraph-count="71" meta:word-count="779" meta:character-count="4711" meta:non-whitespace-character-count="3998"/>
    <meta:generator>LibreOffice/25.8.1.1$Windows_X86_64 LibreOffice_project/54047653041915e595ad4e45cccea684809c77b5</meta:generator>
  </office:meta>
</office:document-meta>
</file>