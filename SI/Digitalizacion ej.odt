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a48" officeooo:paragraph-rsid="0015aa4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ded3" officeooo:paragraph-rsid="0015ded3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istemas biometricos de la actualidad</text:p>
      <text:p text:style-name="P1"/>
      <text:p text:style-name="P2">Los sistemas biometricos son maneras de identificar a una persona,para esto se usan sus huellas dactilares,escaneo de iris,reconocimiento facial,etc.</text:p>
      <text:p text:style-name="P2"/>
      <text:p text:style-name="P2">Se usan para seguridad en moviles,centros de datos,tambien se <text:span text:style-name="T1">usan</text:span> para detectar criminales</text:p>
      <text:p text:style-name="P1"/>
      <text:p text:style-name="P1">2. Ámbitos donde se usan las impresoras 3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8:50:35.734016100</meta:creation-date>
    <dc:date>2025-11-10T09:54:56.738437600</dc:date>
    <meta:editing-duration>PT5M34S</meta:editing-duration>
    <meta:editing-cycles>1</meta:editing-cycles>
    <meta:document-statistic meta:table-count="0" meta:image-count="0" meta:object-count="0" meta:page-count="1" meta:paragraph-count="4" meta:word-count="46" meta:character-count="322" meta:non-whitespace-character-count="280"/>
    <meta:generator>LibreOffice/25.8.1.1$Windows_X86_64 LibreOffice_project/54047653041915e595ad4e45cccea684809c77b5</meta:generator>
  </office:meta>
</office:document-meta>
</file>