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 officeooo:paragraph-rsid="001ba7f9"/>
    </style:style>
    <style:style style:name="T1" style:family="text">
      <style:text-properties officeooo:rsid="001b6b5d"/>
    </style:style>
    <style:style style:name="T2" style:family="text">
      <style:text-properties officeooo:rsid="001ba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tendiendo al apartado 3 sobre funciones del cloud computing indica una herramienta o ejemplo real para cada una de esas funciones</text:p>
      <text:p text:style-name="Standard"/>
      <text:p text:style-name="Standard">Almacenamiento de datos:<text:span text:style-name="T1">Google Drive</text:span></text:p>
      <text:p text:style-name="Standard"/>
      <text:p text:style-name="Standard">Procesamiento de datos:<text:span text:style-name="T2">Amazon EMR</text:span></text:p>
      <text:p text:style-name="Standard"/>
      <text:p text:style-name="Standard">Desarrollo y pruebas de software:<text:span text:style-name="T2">Github Actions</text:span></text:p>
      <text:p text:style-name="Standard"/>
      <text:p text:style-name="Standard">Servicios de hosting:<text:span text:style-name="T2">Hostinger</text:span></text:p>
      <text:p text:style-name="Standard"/>
      <text:p text:style-name="Standard">Mantenimiento predictivo:<text:span text:style-name="T2">IBM Maximo</text:span></text:p>
      <text:p text:style-name="Standard"/>
      <text:p text:style-name="Standard">Control de calidad en tiempo real:<text:span text:style-name="T2">Microsoft Azure Cognitive Services</text:span></text:p>
      <text:p text:style-name="Standard"/>
      <text:p text:style-name="P1">Automatización industrial:<text:span text:style-name="T2">Siemens MindSphere</text:span></text:p>
      <text:p text:style-name="P1"/>
      <text:p text:style-name="P1">Gestión de redes eléctricas inteligentes:<text:span text:style-name="T2">GE Digital Grid</text:span></text:p>
      <text:p text:style-name="P1"/>
      <text:p text:style-name="P1">Monitoreo de infraestructura crítica:<text:span text:style-name="T2">Splunk</text:span></text:p>
      <text:p text:style-name="P1"/>
      <text:p text:style-name="P1">Medición inteligente:<text:span text:style-name="T2">Itron</text:span></text:p>
      <text:p text:style-name="P1"/>
      <text:p text:style-name="P1">Monitorización de pacientes en tiempo real:<text:span text:style-name="T2">Philips HealtgSuite</text:span></text:p>
      <text:p text:style-name="P1"/>
      <text:p text:style-name="P1">Cirugía robótica:<text:span text:style-name="T2">Sistema Da Vinci</text:span></text:p>
      <text:p text:style-name="P1"/>
      <text:p text:style-name="P1">Telemedicina:<text:span text:style-name="T2">Teladoc</text:span></text:p>
      <text:p text:style-name="P1"/>
      <text:p text:style-name="P1">Agricultura de precisión:<text:span text:style-name="T2">John Deere Operations Center</text:span></text:p>
      <text:p text:style-name="P1"/>
      <text:p text:style-name="P1">Ganadería inteligente:<text:span text:style-name="T2">Allflex</text:span></text:p>
      <text:p text:style-name="P1"/>
      <text:p text:style-name="P1">Monitoreo climático local:<text:span text:style-name="T2">The Weather Company</text:span></text:p>
      <text:p text:style-name="P1"/>
      <text:p text:style-name="P2">Experiencia del cliente personalizada:<text:span text:style-name="T2">Salesforce Marketing Cloud</text:span></text:p>
      <text:p text:style-name="P2"/>
      <text:p text:style-name="P1">Sistemas de pago y seguridad:<text:span text:style-name="T2">Strip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determinado_20_16_7e_LT_7e_Gliederung_20_1" style:display-name="Predeterminado 1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, Arial" style:font-family-generic-complex="system" style:font-pitch-complex="variable" style:font-size-complex="12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08:45:43.103436200</meta:creation-date>
    <dc:date>2026-01-19T09:04:14.228527300</dc:date>
    <meta:editing-duration>PT7M17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9" meta:word-count="102" meta:character-count="889" meta:non-whitespace-character-count="806"/>
  </office:meta>
</office:document-meta>
</file>