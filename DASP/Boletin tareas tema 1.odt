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e4f7c" officeooo:paragraph-rsid="000e4f7c" style:font-weight-asian="bold" style:font-weight-complex="bold"/>
    </style:style>
    <style:style style:name="P2" style:family="paragraph" style:parent-style-name="Standard">
      <style:text-properties fo:font-weight="normal" officeooo:rsid="000e4f7c" officeooo:paragraph-rsid="000e4f7c" style:font-weight-asian="normal" style:font-weight-complex="normal"/>
    </style:style>
    <style:style style:name="P3" style:family="paragraph" style:parent-style-name="Standard">
      <style:text-properties fo:font-weight="bold" officeooo:rsid="000ff8a1" officeooo:paragraph-rsid="000ff8a1" style:font-weight-asian="bold" style:font-weight-complex="bold"/>
    </style:style>
    <style:style style:name="P4" style:family="paragraph" style:parent-style-name="Standard">
      <style:text-properties fo:font-weight="normal" officeooo:rsid="000ff8a1" officeooo:paragraph-rsid="00109e51" style:font-weight-asian="normal" style:font-weight-complex="normal"/>
    </style:style>
    <style:style style:name="P5" style:family="paragraph" style:parent-style-name="Standard">
      <style:text-properties fo:font-weight="normal" officeooo:rsid="00109e51" officeooo:paragraph-rsid="00109e51" style:font-weight-asian="normal" style:font-weight-complex="normal"/>
    </style:style>
    <style:style style:name="P6" style:family="paragraph" style:parent-style-name="Standard">
      <style:text-properties fo:font-weight="bold" officeooo:rsid="00109e51" officeooo:paragraph-rsid="00109e51" style:font-weight-asian="bold" style:font-weight-complex="bold"/>
    </style:style>
    <style:style style:name="P7" style:family="paragraph" style:parent-style-name="Standard">
      <style:text-properties fo:font-weight="normal" officeooo:rsid="0010dc7f" officeooo:paragraph-rsid="0010dc7f" style:font-weight-asian="normal" style:font-weight-complex="normal"/>
    </style:style>
    <style:style style:name="P8" style:family="paragraph" style:parent-style-name="Standard">
      <style:text-properties officeooo:paragraph-rsid="0010dc7f"/>
    </style:style>
    <style:style style:name="P9" style:family="paragraph" style:parent-style-name="Standard">
      <style:text-properties fo:font-weight="bold" officeooo:rsid="0010dc7f" officeooo:paragraph-rsid="0010dc7f" style:font-weight-asian="bold" style:font-weight-complex="bold"/>
    </style:style>
    <style:style style:name="P10" style:family="paragraph" style:parent-style-name="Standard">
      <style:text-properties fo:font-weight="bold" officeooo:rsid="0010dc7f" officeooo:paragraph-rsid="001249b3" style:font-weight-asian="bold" style:font-weight-complex="bold"/>
    </style:style>
    <style:style style:name="P11" style:family="paragraph" style:parent-style-name="Standard">
      <style:text-properties fo:font-weight="normal" officeooo:rsid="0010dc7f" officeooo:paragraph-rsid="001249b3" style:font-weight-asian="normal" style:font-weight-complex="normal"/>
    </style:style>
    <style:style style:name="T1" style:family="text">
      <style:text-properties officeooo:rsid="00109e51"/>
    </style:style>
    <style:style style:name="T2" style:family="text">
      <style:text-properties style:text-underline-style="none"/>
    </style:style>
    <style:style style:name="T3" style:family="text">
      <style:text-properties officeooo:rsid="001249b3"/>
    </style:style>
    <style:style style:name="T4" style:family="text">
      <style:text-properties fo:font-weight="normal" officeooo:rsid="0010dc7f" style:font-weight-asian="normal" style:font-weight-complex="normal"/>
    </style:style>
    <style:style style:name="T5" style:family="text">
      <style:text-properties fo:font-weight="normal" officeooo:rsid="001249b3" style:font-weight-asian="normal" style:font-weight-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Busca <text:s/>e incluye 3 definiciones de digitalización en la empresa aportando la URL de la fuente en cada caso. A continuación crea con tus palabras tu propia definición. </text:p>
      <text:p text:style-name="P2"/>
      <text:p text:style-name="P2"><text:a xlink:type="simple" xlink:href="https://www.repsol.com/es/energia-avanzar/innovacion/digitalizacion-de-empresas/index.cshtml" text:style-name="Internet_20_link" text:visited-style-name="Visited_20_Internet_20_Link">https://www.repsol.com/es/energia-avanzar/innovacion/digitalizacion-de-empresas/index.cshtml</text:a></text:p>
      <text:p text:style-name="P2">La digitalización empresarial es el proceso estratégico mediante el cual una compañía transforma y moderniza sus funciones y operaciones, migrando desde un enfoque analógico a un entorno digital.</text:p>
      <text:p text:style-name="P2"/>
      <text:p text:style-name="P2"><text:a xlink:type="simple" xlink:href="https://www.joemoliner.com/blog/digitalizacion-de-las-empresas/" text:style-name="Internet_20_link" text:visited-style-name="Visited_20_Internet_20_Link">https://www.joemoliner.com/blog/digitalizacion-de-las-empresas/</text:a></text:p>
      <text:p text:style-name="P2">La digitalización de las empresas no es otra cosa que reinventar la organización de la misma haciendo uso de la tecnología. Puede sonar complicado, pero es más sencillo de lo que parece. </text:p>
      <text:p text:style-name="P2"/>
      <text:p text:style-name="P2"><text:a xlink:type="simple" xlink:href="https://www.signaturit.com/es/blog/digitalizacion-empresas/" text:style-name="Internet_20_link" text:visited-style-name="Visited_20_Internet_20_Link">https://www.signaturit.com/es/blog/digitalizacion-empresas/</text:a></text:p>
      <text:p text:style-name="P2">De forma muy sencilla, podemos decir que la digitalización de las empresas es el proceso de transformar en profundidad una organización empresarial, sobre la base de herramientas tecnológicas y orientando las distintas facetas del negocio hacia el entorno digital.</text:p>
      <text:p text:style-name="P2"/>
      <text:p text:style-name="P2">La digitalización de empresas es el proceso en el que se reorganiza una empresa para usar la tecnología para mejorar en aspectos de seguridad,fiabilidad,productividad,etc.</text:p>
      <text:p text:style-name="P2"/>
      <text:p text:style-name="P3">2. En la unidad hablamos del impacto de la tecnología digital en los recursos humanos. Investiga y cita al menos 2 puestos de trabajo que hayan desaparecido o se hayan visto reducidos a causa de las nuevas tecnologías y otros dos que se hayan creado por el uso de estas tecnologías.</text:p>
      <text:p text:style-name="P3"/>
      <text:p text:style-name="P4"><text:span text:style-name="T1">Desaparecieron: </text:span>Pregonero y telefonista. </text:p>
      <text:p text:style-name="P5">Aparecieron: Analista de datos y ciberseguridad.</text:p>
      <text:p text:style-name="P5"/>
      <text:p text:style-name="P6">3. Diseña una infografía con Canva sobre las diferencias y similitudes de las tecnologías IT y OT. Añádele una licencia CC. Comparte aquí la URL para acceder a dicha infografía. </text:p>
      <text:p text:style-name="P5">https://www.canva.com/design/DAG2ToHbQP8/_TfC6x7aZdx-TZAx3L8O-g/view?utm_content=DAG2ToHbQP8&amp;utm_campaign=designshare&amp;utm_medium=link2&amp;utm_source=uniquelinks&amp;utlId=hf44271ac84</text:p>
      <text:p text:style-name="P5"/>
      <text:p text:style-name="P6">4. Piensa en tu instituto como si fuera una empresa que quiere ponerse a la vanguardia en tecnología. Señala ejemplos de actividades que podrían realizar <text:s/>cada uno de los nuevos departamentos IT estudiados <text:s/>para acercarse a este objetivo estratégico empresarial. </text:p>
      <text:p text:style-name="P5">Mantenimiento y montaje de equipos:Encargado de los equipos usados en clase,etc.</text:p>
      <text:p text:style-name="P5"><text:span text:style-name="T2">Mantenimiento</text:span> y montaje de servidor:Encargado de los servidores.</text:p>
      <text:p text:style-name="P5">Mantenimiento y creacion de base de datos:Encargado en la administracion de la base de datos.</text:p>
      <text:p text:style-name="P5">Ciberseguridad:Encargado de mantener la seguridad de la informacion del centro,datos,etc.</text:p>
      <text:p text:style-name="P5">Copias de seguridad:Encargado de administrar y mantener seguras las copias de seguridad de los datos.</text:p>
      <text:p text:style-name="P6"/>
      <text:p text:style-name="P6">5. Indica si las siguientes tecnologías son IT o tecnologías OT y en qué consisten cada una de ellas: </text:p>
      <text:p text:style-name="P6">a) Almacenamiento en la nube.</text:p>
      <text:p text:style-name="P7">IT.</text:p>
      <text:p text:style-name="P6"/>
      <text:p text:style-name="P6">b) Inteligencia artificial.</text:p>
      <text:p text:style-name="P7">IT. busca que las m<text:span text:style-name="T3">a</text:span>quinas “piensen” o tomen decisiones, aprendan de datos, reconozcan patrones, predigan cosas, etc.</text:p>
      <text:p text:style-name="P6"/>
      <text:p text:style-name="P6"><text:soft-page-break/>c) Sistemas de gestion de activos.</text:p>
      <text:p text:style-name="P8"><text:span text:style-name="T4">OT.</text:span><text:span text:style-name="T5">S</text:span>istemas que controlan los equipos f<text:span text:style-name="T3">i</text:span>sicos ara saber su estado, mantenimiento, operaci<text:span text:style-name="T3">o</text:span>n, optimización,<text:span text:style-name="T3">etc</text:span>.</text:p>
      <text:p text:style-name="P6"/>
      <text:p text:style-name="P6">d) Gemelos digitales.</text:p>
      <text:p text:style-name="P7">OT.Un gemelo digital es una r<text:span text:style-name="T3">e</text:span>plica virtual de un objeto f<text:span text:style-name="T3">i</text:span>sico que refleja en tiempo real lo que sucede en el “gemelo” real: sensores, datos, condiciones, para simular, predecir fallos, mejorar rendimiento.</text:p>
      <text:p text:style-name="P9"/>
      <text:p text:style-name="P9">6. Lee el artículo “La colaboración entre OT y IT es fundamental para la industria 4.0” y contesta a las siguientes cuestiones:</text:p>
      <text:p text:style-name="P9"><text:s text:c="4"/>a) ¿Qué infraestructuras son críticas en fábrica?</text:p>
      <text:p text:style-name="P9"><text:span text:style-name="T6"><text:tab/>-Las infraestructuras OT que controlan y monitorean los sistemas de producción. </text:span><text:line-break/><text:line-break/><text:tab/>-<text:span text:style-name="T6">Equipos de control, sistemas SCADA, PLCs, redes industriales.</text:span></text:p>
      <text:p text:style-name="P9"><text:s text:c="4"/>b) ¿Qué ocurre cuando los sistemas OT están aislados de la red de IT?</text:p>
      <text:p text:style-name="P7"><text:tab/>-Que no se aprovechan los datos para tomar decisiones globales ni análisis avanzados.<text:line-break/><text:line-break/><text:tab/>-Los equipos OT pueden no tener seguridad moderna, porque quedaron desfasados, y así <text:tab/>quedan vulnerables. <text:line-break/><text:line-break/><text:tab/>-También impide la sinergia entre operaciones y gestión de datos.</text:p>
      <text:p text:style-name="P9">c) ¿Qué riesgos y vulnerabilidades puede tener la integración de sistemas OT e IT?</text:p>
      <text:p text:style-name="P10"><text:tab/>-<text:span text:style-name="T6">Nuevos vectores de ataque: si conectas OT con IT sin cuidado, un fallo en IT puede afectar <text:tab/>OT. <text:line-break/><text:tab/></text:span></text:p>
      <text:p text:style-name="P11"><text:tab/>-Pieza legacy: los sistemas OT muchas veces son antiguos, con protocolos inseguros o sin <text:tab/>protección. <text:line-break/><text:line-break/><text:tab/>-Falta de preparación: los equipos de OT tal vez no manejen ciberseguridad, y los de IT no <text:tab/>conozcan bien los requisitos operativos.</text:p>
      <text:p text:style-name="P9"><text:s text:c="4"/>d) ¿Qué estrategia conjunta deben utilizar los equipos de IT y OT?</text:p>
      <text:p text:style-name="P11"><text:tab/>-Deben colaborar estrechamente, entender prioridades del otro. <text:line-break/><text:line-break/><text:line-break/><text:tab/>-Hacer una estrategia conjunta de ciberseguridad (firewalls, detección de intrusos, <text:tab/>cifrado) que incluya tanto los sistemas OT como IT. <text:line-break/><text:line-break/><text:tab/>-Implementar estándares comunes, protocolos seguros, monitoreo compartido, <text:tab/>comunicación fluida para que no haya silos.</text:p>
      <text:p text:style-name="P9"/>
      <text:p text:style-name="P9">7. Lee el documento de Siemens “Como construir una fábrica inteligente para pymes”, que establece las ventajas de digitalizar una empresa industrial de extremo a extremo, y responde a las preguntas:</text:p>
      <text:p text:style-name="P9"><text:s text:c="4"/>a) ¿Qué es una fábrica inteligente?</text:p>
      <text:p text:style-name="P9"><text:tab/>-<text:span text:style-name="T6">Es una fábrica donde máquinas, sistemas y logística están interconectados, pueden <text:tab/>comunicarse entre sí, recopilar datos y adaptarse automáticamente al cambio. <text:line-break/><text:line-break/><text:line-break/><text:tab/>-El ser humano tiene menor intervención directa: supervisa, optimiza, pero gran parte se <text:tab/>ejecuta de forma autónoma.</text:span></text:p>
      <text:p text:style-name="P7"/>
      <text:p text:style-name="P9"><text:soft-page-break/><text:s text:c="4"/>b) ¿Cuales son las tecnologías de las fábricas inteligentes?</text:p>
      <text:p text:style-name="P9"><text:tab/>-<text:span text:style-name="T6">Automatización y robótica <text:line-break/><text:line-break/><text:tab/>-Sensores, IoT industrial (Internet de las cosas) <text:line-break/><text:line-break/><text:tab/>-Gemelos digitales <text:line-break/><text:line-break/><text:tab/>-Sistemas de planificación y simulación (modelado digital del proceso) <text:line-break/><text:line-break/><text:tab/>-Gestión de datos, análisis en tiempo real <text:line-break/><text:line-break/><text:tab/>-Integración extremo a extremo (desde materia prima hasta cliente)</text:span></text:p>
      <text:p text:style-name="P9"/>
      <text:p text:style-name="P9">c) ¿Qué ventajas se indican acerca de la creación de fábricas inteligentes?</text:p>
      <text:p text:style-name="P9"><text:tab/>-<text:span text:style-name="T6">Reducción de costes y optimización de recursos <text:line-break/><text:line-break/><text:tab/>-Menores tiempos de ciclo (produce más rápido) <text:line-break/><text:line-break/><text:tab/>-Mejora de la productividad y eficiencia interna <text:line-break/><text:line-break/><text:tab/>-Flexibilidad para adaptarse a cambios de demanda <text:line-break/><text:line-break/><text:tab/>-Disminución de errores humanos y calidad más consistente <text:line-break/><text:line-break/><text:tab/>-Mayor sostenibilidad medioambiental al optimizar recurs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08:59:27.558620800</meta:creation-date>
    <dc:date>2025-10-20T09:03:14.669556300</dc:date>
    <meta:editing-duration>PT19M52S</meta:editing-duration>
    <meta:editing-cycles>3</meta:editing-cycles>
    <meta:generator>LibreOffice/25.8.1.1$Windows_X86_64 LibreOffice_project/54047653041915e595ad4e45cccea684809c77b5</meta:generator>
    <meta:document-statistic meta:table-count="0" meta:image-count="0" meta:object-count="0" meta:page-count="3" meta:paragraph-count="45" meta:word-count="841" meta:character-count="6020" meta:non-whitespace-character-count="5124"/>
  </office:meta>
</office:document-meta>
</file>