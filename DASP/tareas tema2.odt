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roman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52ee" officeooo:paragraph-rsid="001952ee" style:font-weight-asian="bold" style:font-weight-complex="bold"/>
    </style:style>
    <style:style style:name="P2" style:family="paragraph" style:parent-style-name="Standard">
      <style:text-properties officeooo:rsid="001952ee" officeooo:paragraph-rsid="001952ee"/>
    </style:style>
    <style:style style:name="P3" style:family="paragraph" style:parent-style-name="Standard">
      <style:paragraph-properties fo:text-align="justify" style:justify-single-word="false"/>
      <style:text-properties officeooo:rsid="001952ee" officeooo:paragraph-rsid="001952ee"/>
    </style:style>
    <style:style style:name="P4" style:family="paragraph" style:parent-style-name="Standard">
      <style:paragraph-properties fo:text-align="justify" style:justify-single-word="false"/>
      <style:text-properties officeooo:rsid="00270ad5" officeooo:paragraph-rsid="00270ad5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30c25d" officeooo:paragraph-rsid="0030c25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30c25d" officeooo:paragraph-rsid="0030c25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rsid="00270ad5" officeooo:paragraph-rsid="0028b180"/>
    </style:style>
    <style:style style:name="P8" style:family="paragraph" style:parent-style-name="Standard">
      <style:paragraph-properties fo:text-align="justify" style:justify-single-word="false"/>
      <style:text-properties officeooo:rsid="0030c25d" officeooo:paragraph-rsid="0030c25d"/>
    </style:style>
    <style:style style:name="P9" style:family="paragraph" style:parent-style-name="Standard">
      <style:paragraph-properties fo:text-align="justify" style:justify-single-word="false"/>
      <style:text-properties officeooo:rsid="002a454c" officeooo:paragraph-rsid="002a454c"/>
    </style:style>
    <style:style style:name="P10" style:family="paragraph" style:parent-style-name="Standard">
      <style:paragraph-properties fo:text-align="justify" style:justify-single-word="false"/>
      <style:text-properties officeooo:rsid="002a454c" officeooo:paragraph-rsid="002ad6c0"/>
    </style:style>
    <style:style style:name="P11" style:family="paragraph" style:parent-style-name="Standard">
      <style:paragraph-properties fo:text-align="justify" style:justify-single-word="false"/>
      <style:text-properties officeooo:rsid="002783df" officeooo:paragraph-rsid="002783df"/>
    </style:style>
    <style:style style:name="P12" style:family="paragraph" style:parent-style-name="Standard">
      <style:paragraph-properties fo:text-align="justify" style:justify-single-word="false"/>
      <style:text-properties officeooo:rsid="0035fd79" officeooo:paragraph-rsid="0035fd79"/>
    </style:style>
    <style:style style:name="P13" style:family="paragraph" style:parent-style-name="Standard">
      <style:paragraph-properties fo:text-align="justify" style:justify-single-word="false"/>
      <style:text-properties officeooo:rsid="0030ff77" officeooo:paragraph-rsid="0030ff77"/>
    </style:style>
    <style:style style:name="P14" style:family="paragraph" style:parent-style-name="Standard">
      <style:paragraph-properties fo:text-align="justify" style:justify-single-word="false"/>
      <style:text-properties fo:language="pt" fo:country="PT" officeooo:rsid="002cb6e3" officeooo:paragraph-rsid="0028b180"/>
    </style:style>
    <style:style style:name="P15" style:family="paragraph" style:parent-style-name="Standard">
      <style:paragraph-properties fo:text-align="justify" style:justify-single-word="false"/>
      <style:text-properties fo:language="pt" fo:country="PT" officeooo:rsid="0030ff77" officeooo:paragraph-rsid="0030ff77"/>
    </style:style>
    <style:style style:name="P16" style:family="paragraph" style:parent-style-name="Standard">
      <style:paragraph-properties fo:text-align="justify" style:justify-single-word="false"/>
      <style:text-properties fo:language="pt" fo:country="PT" fo:font-weight="bold" officeooo:rsid="0030ff77" officeooo:paragraph-rsid="0030ff77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2ad6c0"/>
    </style:style>
    <style:style style:name="T1" style:family="text">
      <style:text-properties officeooo:rsid="002621ab"/>
    </style:style>
    <style:style style:name="T2" style:family="text">
      <style:text-properties officeooo:rsid="00270ad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pt" fo:country="PT"/>
    </style:style>
    <style:style style:name="T5" style:family="text">
      <style:text-properties officeooo:rsid="002783df"/>
    </style:style>
    <style:style style:name="T6" style:family="text">
      <style:text-properties officeooo:rsid="00373bd4"/>
    </style:style>
    <style:style style:name="T7" style:family="text">
      <style:text-properties officeooo:rsid="002cb6e3"/>
    </style:style>
    <style:style style:name="T8" style:family="text">
      <style:text-properties fo:language="it" fo:country="IT"/>
    </style:style>
    <style:style style:name="T9" style:family="text">
      <style:text-properties fo:language="pt" fo:country="PT" officeooo:rsid="002cb6e3"/>
    </style:style>
    <style:style style:name="T10" style:family="text">
      <style:text-properties fo:language="pt" fo:country="PT" officeooo:rsid="002d270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none" officeooo:rsid="002cb6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OLETÍN</text:span> DE TAREAS TEMA <text:span text:style-name="T2">2</text:span></text:p>
      <text:p text:style-name="P2"/>
      <text:p text:style-name="P3"/>
      <text:p text:style-name="P4">Ejercicio 1. Seguramente en algún momento de tu rutina diaria haces uso de una o varias THD. Haz un listado de, al menos, tres de ellas y describe el uso que le has dado. (ce1)</text:p>
      <text:p text:style-name="P4"/>
      <text:p text:style-name="P5">IA:<text:span text:style-name="T3">La inteligencia artificial la uso casi diariamente para lo que antes era hacer búsquedas en google por ejemplo,ahora con la ia es una forma mas rápida y automatizada de hacerlo.</text:span></text:p>
      <text:p text:style-name="P6"/>
      <text:p text:style-name="P5">Ciberseguridad:<text:span text:style-name="T3">Por ejemplo he automatizado el proceso de crear una contraseña,mediante un gestor de contraseñas el cual las crea automáticamente de una manera aleatoria y mucho mas segura que tener alguna cosa personal y encima tener que recordarla o tener la misma en todos sitios o algo por el estilo.</text:span></text:p>
      <text:p text:style-name="P6"/>
      <text:p text:style-name="P5">Nube:<text:span text:style-name="T3">A diario uso la nube,por ejemplo de google con google drive,para subir documentos o cosas de clase,etc. También automáticamente se hacen copias de seguridad de tus datos y cosas así.</text:span></text:p>
      <text:p text:style-name="P4"/>
      <text:p text:style-name="P7">Ejercicio 2. <text:span text:style-name="T4">Explica c</text:span>ómo las tecnologías habilitadoras digitales pueden impulsar el desarrollo de nuevos productos y servicios en una empresa. Proporciona un ejemplo concreto.</text:p>
      <text:p text:style-name="P7"/>
      <text:p text:style-name="P6">Pueden impulsarlo ya que por ejemplo usando el big data puedes tener una base de datos de los productos que mas se compran,que mas se buscan,etc. Y por ejemplo si ves que hay un producto que no tienes o un servicio pero se busca mucho podrías plantearte implementarlo de manera que sabes que a tus clientes le va a interesar.</text:p>
      <text:p text:style-name="P7"/>
      <text:p text:style-name="P4">Ejercicio 3. Piensa en una actividad o trabajo propio de tu sector profesional y en la aplicación del Internet de las cosas (IoT). Responde a las siguientes preguntas:</text:p>
      <text:p text:style-name="P4">a) ¿Cómo crees que podría impactar de manera positiva en términos medioambientales?</text:p>
      <text:p text:style-name="P8">Podría afectar de manera positiva ya que puedes monitorizar y automatizar procesos para ayudar a mantener el medio ambiente de manera correcta.</text:p>
      <text:p text:style-name="P4"/>
      <text:p text:style-name="P4">b) ¿Qué efectos negativos podría conllevar <text:s/>su uso en relación con el medio ambiente?</text:p>
      <text:p text:style-name="P8">La creacion de residuos electricos,el consumo de energia,etc.</text:p>
      <text:p text:style-name="P4"/>
      <text:p text:style-name="P4">Ejercicio 4. <text:span text:style-name="T5">Visualiza el siguiente video y responde a las siguientes cuestiones:</text:span></text:p>
      <text:p text:style-name="P9"/>
      <text:p text:style-name="P10"><text:a xlink:type="simple" xlink:href="https://www.youtube.com/watch?v=Yyw-BFcvRyw" office:target-frame-name="_top" xlink:show="replace" text:style-name="Internet_20_link" text:visited-style-name="Visited_20_Internet_20_Link"><text:span text:style-name="Hipervínculo">https://www.youtube.com/watch?v=Yyw-BFcvRyw</text:span></text:a></text:p>
      <text:p text:style-name="P9"/>
      <text:p text:style-name="P11">a) ¿Qué usos se explican en el vídeo sobre la robótica en la vida cotidiana?</text:p>
      <text:p text:style-name="P12">Explica usos como que un perro robot te ayude a hacer la compra,te haga compañía,te defienda,etc.</text:p>
      <text:p text:style-name="P12">También se habla de que puede ayudar a las personas mayores haciéndole un seguimiento de su salud para poder enviar informes a su medico,etc.</text:p>
      <text:p text:style-name="P11"/>
      <text:p text:style-name="P11"/>
      <text:p text:style-name="P9">b) Según el vídeo, ¿Qué aplicación tendrá la robótica en el ámbito de la educación? ¿Qué otro tipo de usos relacionados con este ámbito se te ocurren?</text:p>
      <text:p text:style-name="P12">Tiene usos como fomentar la lectura al hacer juegos con historias,puede ayudar a los niños autistas a entender los gestos y las emociones y en general pueden ser muy útiles en el ámbito de la educación. <text:span text:style-name="T6">Un robot puede servir como ayudante de los profesores y así tener varias explicaciones distintas en caso de que no lo entiendan bien los alumnos.</text:span></text:p>
      <text:p text:style-name="P9"/>
      <text:p text:style-name="P9"/>
      <text:p text:style-name="P9"><text:soft-page-break/>c) También se trata la relación entre la robótica y la salud, ¿Qué usos se explican? ¿Conoces algún otro?</text:p>
      <text:p text:style-name="P12">Explican usos en operaciones ya que los médicos ahora operan con unos brazos roboticos que controlan mediante un ordenador para que todo sea mas preciso y mejor,también se plantea el uso de robots para enviarlos a zonas de rescate y que así nadie se tenga que jugar la vida para salvar a una persona en una situación complicada,<text:span text:style-name="T6">etc. No.</text:span></text:p>
      <text:p text:style-name="P9"/>
      <text:p text:style-name="P4"/>
      <text:p text:style-name="P7">Ejercicio 5. <text:span text:style-name="T4">Analiza c</text:span>ómo la implementación de THD afecta tanto la parte de negocio como la parte de planta de una empresa manufacturera.</text:p>
      <text:p text:style-name="P13">En la parte de negocio aprovechando los datos y automatizando cosas con ellos,etc.<text:line-break/>En la parte de planta automatizando el proceso de creacion con brazos roboticos,robots,ect.</text:p>
      <text:p text:style-name="P7"/>
      <text:p text:style-name="P7">Ejercicio 6. <text:span text:style-name="T7">Elige una </text:span>mejora específica en los entornos IT y <text:span text:style-name="T7">otra en </text:span>OT debido a la implantació<text:span text:style-name="T8">n de tecnolog</text:span>í<text:span text:style-name="T4">as habilitadoras digitales </text:span><text:span text:style-name="T9">y desarróllala</text:span><text:span text:style-name="T10">s</text:span><text:span text:style-name="T9">.</text:span></text:p>
      <text:p text:style-name="P14"/>
      <text:p text:style-name="P15"><text:span text:style-name="T11">IT:</text:span>Aprovechar los datos,hacer cosas com ellos,automatizar los procesos de los datos,etc.</text:p>
      <text:p text:style-name="P15"/>
      <text:p text:style-name="P16">OT:<text:span text:style-name="T3">Usar maquinas para automatizar la fabricacion de cosas,usar sensores para monitorizar todo el proceso y saber si hay algun fallo,etc.</text:span></text:p>
      <text:p text:style-name="P14"/>
      <text:p text:style-name="P7"/>
      <text:p text:style-name="P17">Ejercicio 7. <text:span text:style-name="T7">Selecciona una de las THD estudiadas en la unidad y elabora una infografía en la qué indiques en qué consiste, cuales son su características y áreas de aplicación de dicha THD. Aporta el enlace a la misma. Añade licencia CC.</text:span><text:span text:style-name="T12"/></text:p>
      <text:p text:style-name="P4">https://www.canva.com/design/DAG5mFXsC7s/V9AU91if3_gdnKamx5hDdQ/view?utm_content=DAG5mFXsC7s&amp;utm_campaign=designshare&amp;utm_medium=link2&amp;utm_source=uniquelinks&amp;utlId=hcb57491005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roman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2.54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determinado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Dashed" style:display-name="Arrow Dashed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st_20_Paragraph" style:display-name="List Paragraph" style:family="paragraph" style:default-outline-level="">
      <style:paragraph-properties fo:margin-left="2.24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262626" loext:opacity="100%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lace_20_del_20_índice" style:display-name="Enlace del índi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8" style:display-name="ListLabel 73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7" style:display-name="ListLabel 73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6" style:display-name="ListLabel 73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5" style:display-name="ListLabel 73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4" style:display-name="ListLabel 73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3" style:display-name="ListLabel 73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2" style:display-name="ListLabel 73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1" style:display-name="ListLabel 73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0" style:display-name="ListLabel 73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9" style:display-name="ListLabel 72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8" style:display-name="ListLabel 72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7" style:display-name="ListLabel 72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6" style:display-name="ListLabel 72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5" style:display-name="ListLabel 72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4" style:display-name="ListLabel 72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3" style:display-name="ListLabel 72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2" style:display-name="ListLabel 72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1" style:display-name="ListLabel 72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0" style:display-name="ListLabel 72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9" style:display-name="ListLabel 71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8" style:display-name="ListLabel 71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7" style:display-name="ListLabel 71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6" style:display-name="ListLabel 71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5" style:display-name="ListLabel 71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4" style:display-name="ListLabel 71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3" style:display-name="ListLabel 71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2" style:display-name="ListLabel 71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1" style:display-name="ListLabel 7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0" style:display-name="ListLabel 71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9" style:display-name="ListLabel 70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8" style:display-name="ListLabel 70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7" style:display-name="ListLabel 70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6" style:display-name="ListLabel 70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5" style:display-name="ListLabel 70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4" style:display-name="ListLabel 70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3" style:display-name="ListLabel 70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2" style:display-name="ListLabel 70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1" style:display-name="ListLabel 70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0" style:display-name="ListLabel 70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9" style:display-name="ListLabel 69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8" style:display-name="ListLabel 69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7" style:display-name="ListLabel 69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6" style:display-name="ListLabel 69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5" style:display-name="ListLabel 69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4" style:display-name="ListLabel 69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3" style:display-name="ListLabel 69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2" style:display-name="ListLabel 69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1" style:display-name="ListLabel 69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0" style:display-name="ListLabel 69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9" style:display-name="ListLabel 68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8" style:display-name="ListLabel 68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7" style:display-name="ListLabel 68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6" style:display-name="ListLabel 68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5" style:display-name="ListLabel 68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4" style:display-name="ListLabel 68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3" style:display-name="ListLabel 68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2" style:display-name="ListLabel 68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1" style:display-name="ListLabel 68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0" style:display-name="ListLabel 68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9" style:display-name="ListLabel 67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8" style:display-name="ListLabel 67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7" style:display-name="ListLabel 67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6" style:display-name="ListLabel 67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5" style:display-name="ListLabel 67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4" style:display-name="ListLabel 67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3" style:display-name="ListLabel 67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2" style:display-name="ListLabel 67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1" style:display-name="ListLabel 67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0" style:display-name="ListLabel 67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9" style:display-name="ListLabel 66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8" style:display-name="ListLabel 66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7" style:display-name="ListLabel 66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6" style:display-name="ListLabel 66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5" style:display-name="ListLabel 66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4" style:display-name="ListLabel 66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3" style:display-name="ListLabel 66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2" style:display-name="ListLabel 66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1" style:display-name="ListLabel 66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0" style:display-name="ListLabel 66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9" style:display-name="ListLabel 65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8" style:display-name="ListLabel 65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7" style:display-name="ListLabel 65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6" style:display-name="ListLabel 65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5" style:display-name="ListLabel 65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4" style:display-name="ListLabel 65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3" style:display-name="ListLabel 65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2" style:display-name="ListLabel 65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1" style:display-name="ListLabel 65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0" style:display-name="ListLabel 65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9" style:display-name="ListLabel 64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8" style:display-name="ListLabel 64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7" style:display-name="ListLabel 64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6" style:display-name="ListLabel 64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5" style:display-name="ListLabel 64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4" style:display-name="ListLabel 64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3" style:display-name="ListLabel 64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2" style:display-name="ListLabel 64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1" style:display-name="ListLabel 64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0" style:display-name="ListLabel 64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9" style:display-name="ListLabel 639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8" style:display-name="ListLabel 638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7" style:display-name="ListLabel 637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6" style:display-name="ListLabel 636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5" style:display-name="ListLabel 635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4" style:display-name="ListLabel 634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3" style:display-name="ListLabel 633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2" style:display-name="ListLabel 63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1" style:display-name="ListLabel 63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0" style:display-name="ListLabel 63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9" style:display-name="ListLabel 62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8" style:display-name="ListLabel 62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7" style:display-name="ListLabel 62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6" style:display-name="ListLabel 62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5" style:display-name="ListLabel 62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4" style:display-name="ListLabel 62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3" style:display-name="ListLabel 62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2" style:display-name="ListLabel 62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1" style:display-name="ListLabel 62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0" style:display-name="ListLabel 62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9" style:display-name="ListLabel 61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8" style:display-name="ListLabel 61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7" style:display-name="ListLabel 61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6" style:display-name="ListLabel 61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5" style:display-name="ListLabel 61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4" style:display-name="ListLabel 61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3" style:display-name="ListLabel 61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2" style:display-name="ListLabel 61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1" style:display-name="ListLabel 6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0" style:display-name="ListLabel 61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9" style:display-name="ListLabel 60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8" style:display-name="ListLabel 60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7" style:display-name="ListLabel 60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6" style:display-name="ListLabel 60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5" style:display-name="ListLabel 60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4" style:display-name="ListLabel 60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3" style:display-name="ListLabel 60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2" style:display-name="ListLabel 60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1" style:display-name="ListLabel 60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0" style:display-name="ListLabel 60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9" style:display-name="ListLabel 59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8" style:display-name="ListLabel 59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7" style:display-name="ListLabel 59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6" style:display-name="ListLabel 59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5" style:display-name="ListLabel 59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4" style:display-name="ListLabel 59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3" style:display-name="ListLabel 59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2" style:display-name="ListLabel 59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1" style:display-name="ListLabel 59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0" style:display-name="ListLabel 59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9" style:display-name="ListLabel 58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8" style:display-name="ListLabel 58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7" style:display-name="ListLabel 58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6" style:display-name="ListLabel 58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5" style:display-name="ListLabel 58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4" style:display-name="ListLabel 58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3" style:display-name="ListLabel 58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2" style:display-name="ListLabel 58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1" style:display-name="ListLabel 58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0" style:display-name="ListLabel 58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9" style:display-name="ListLabel 57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8" style:display-name="ListLabel 57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7" style:display-name="ListLabel 57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6" style:display-name="ListLabel 57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5" style:display-name="ListLabel 57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4" style:display-name="ListLabel 57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3" style:display-name="ListLabel 57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2" style:display-name="ListLabel 57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1" style:display-name="ListLabel 57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0" style:display-name="ListLabel 57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9" style:display-name="ListLabel 56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8" style:display-name="ListLabel 56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7" style:display-name="ListLabel 56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6" style:display-name="ListLabel 56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5" style:display-name="ListLabel 56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4" style:display-name="ListLabel 56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3" style:display-name="ListLabel 56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2" style:display-name="ListLabel 56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1" style:display-name="ListLabel 56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0" style:display-name="ListLabel 56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9" style:display-name="ListLabel 55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8" style:display-name="ListLabel 55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7" style:display-name="ListLabel 55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6" style:display-name="ListLabel 55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5" style:display-name="ListLabel 55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4" style:display-name="ListLabel 55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3" style:display-name="ListLabel 55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2" style:display-name="ListLabel 55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1" style:display-name="ListLabel 55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0" style:display-name="ListLabel 55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9" style:display-name="ListLabel 54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8" style:display-name="ListLabel 54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7" style:display-name="ListLabel 54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6" style:display-name="ListLabel 54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5" style:display-name="ListLabel 54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4" style:display-name="ListLabel 54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3" style:display-name="ListLabel 54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2" style:display-name="ListLabel 54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1" style:display-name="ListLabel 54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0" style:display-name="ListLabel 54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9" style:display-name="ListLabel 53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8" style:display-name="ListLabel 53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7" style:display-name="ListLabel 53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6" style:display-name="ListLabel 53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5" style:display-name="ListLabel 53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4" style:display-name="ListLabel 53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3" style:display-name="ListLabel 53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2" style:display-name="ListLabel 53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1" style:display-name="ListLabel 53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0" style:display-name="ListLabel 53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9" style:display-name="ListLabel 52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8" style:display-name="ListLabel 52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7" style:display-name="ListLabel 52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6" style:display-name="ListLabel 52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5" style:display-name="ListLabel 52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4" style:display-name="ListLabel 52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3" style:display-name="ListLabel 52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2" style:display-name="ListLabel 52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1" style:display-name="ListLabel 52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0" style:display-name="ListLabel 52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9" style:display-name="ListLabel 51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8" style:display-name="ListLabel 51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7" style:display-name="ListLabel 51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6" style:display-name="ListLabel 51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5" style:display-name="ListLabel 51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4" style:display-name="ListLabel 51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3" style:display-name="ListLabel 51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2" style:display-name="ListLabel 51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1" style:display-name="ListLabel 5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0" style:display-name="ListLabel 51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9" style:display-name="ListLabel 50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8" style:display-name="ListLabel 50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7" style:display-name="ListLabel 50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6" style:display-name="ListLabel 50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5" style:display-name="ListLabel 50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4" style:display-name="ListLabel 50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3" style:display-name="ListLabel 50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2" style:display-name="ListLabel 50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1" style:display-name="ListLabel 50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0" style:display-name="ListLabel 50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9" style:display-name="ListLabel 49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8" style:display-name="ListLabel 49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7" style:display-name="ListLabel 49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6" style:display-name="ListLabel 49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5" style:display-name="ListLabel 49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4" style:display-name="ListLabel 49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3" style:display-name="ListLabel 49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2" style:display-name="ListLabel 49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1" style:display-name="ListLabel 49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0" style:display-name="ListLabel 49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9" style:display-name="ListLabel 48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8" style:display-name="ListLabel 48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7" style:display-name="ListLabel 48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6" style:display-name="ListLabel 48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5" style:display-name="ListLabel 48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4" style:display-name="ListLabel 48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3" style:display-name="ListLabel 48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2" style:display-name="ListLabel 48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1" style:display-name="ListLabel 48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0" style:display-name="ListLabel 48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9" style:display-name="ListLabel 47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8" style:display-name="ListLabel 47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7" style:display-name="ListLabel 47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6" style:display-name="ListLabel 47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5" style:display-name="ListLabel 47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4" style:display-name="ListLabel 47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3" style:display-name="ListLabel 47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2" style:display-name="ListLabel 47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1" style:display-name="ListLabel 47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0" style:display-name="ListLabel 47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9" style:display-name="ListLabel 469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8" style:display-name="ListLabel 46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7" style:display-name="ListLabel 46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6" style:display-name="ListLabel 46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5" style:display-name="ListLabel 46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4" style:display-name="ListLabel 46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3" style:display-name="ListLabel 46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2" style:display-name="ListLabel 46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1" style:display-name="ListLabel 46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0" style:display-name="ListLabel 46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9" style:display-name="ListLabel 45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8" style:display-name="ListLabel 45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7" style:display-name="ListLabel 45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6" style:display-name="ListLabel 45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5" style:display-name="ListLabel 45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4" style:display-name="ListLabel 45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3" style:display-name="ListLabel 45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2" style:display-name="ListLabel 45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1" style:display-name="ListLabel 45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0" style:display-name="ListLabel 45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9" style:display-name="ListLabel 44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8" style:display-name="ListLabel 44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7" style:display-name="ListLabel 44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6" style:display-name="ListLabel 44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5" style:display-name="ListLabel 44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4" style:display-name="ListLabel 44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3" style:display-name="ListLabel 44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2" style:display-name="ListLabel 44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1" style:display-name="ListLabel 44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0" style:display-name="ListLabel 44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9" style:display-name="ListLabel 43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8" style:display-name="ListLabel 43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7" style:display-name="ListLabel 43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6" style:display-name="ListLabel 43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5" style:display-name="ListLabel 43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4" style:display-name="ListLabel 43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3" style:display-name="ListLabel 43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2" style:display-name="ListLabel 43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1" style:display-name="ListLabel 43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0" style:display-name="ListLabel 43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9" style:display-name="ListLabel 42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8" style:display-name="ListLabel 42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7" style:display-name="ListLabel 42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6" style:display-name="ListLabel 42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5" style:display-name="ListLabel 42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4" style:display-name="ListLabel 42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3" style:display-name="ListLabel 423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2" style:display-name="ListLabel 42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1" style:display-name="ListLabel 421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0" style:display-name="ListLabel 420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9" style:display-name="ListLabel 419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8" style:display-name="ListLabel 418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7" style:display-name="ListLabel 417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6" style:display-name="ListLabel 416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5" style:display-name="ListLabel 41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4" style:display-name="ListLabel 41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3" style:display-name="ListLabel 41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2" style:display-name="ListLabel 41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1" style:display-name="ListLabel 4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0" style:display-name="ListLabel 41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9" style:display-name="ListLabel 40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8" style:display-name="ListLabel 40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7" style:display-name="ListLabel 40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6" style:display-name="ListLabel 40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5" style:display-name="ListLabel 40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4" style:display-name="ListLabel 40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3" style:display-name="ListLabel 40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2" style:display-name="ListLabel 40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1" style:display-name="ListLabel 40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0" style:display-name="ListLabel 40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9" style:display-name="ListLabel 39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8" style:display-name="ListLabel 39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7" style:display-name="ListLabel 39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6" style:display-name="ListLabel 39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5" style:display-name="ListLabel 39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4" style:display-name="ListLabel 39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3" style:display-name="ListLabel 39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2" style:display-name="ListLabel 39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1" style:display-name="ListLabel 39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0" style:display-name="ListLabel 39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9" style:display-name="ListLabel 38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8" style:display-name="ListLabel 38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7" style:display-name="ListLabel 387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6" style:display-name="ListLabel 386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5" style:display-name="ListLabel 385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4" style:display-name="ListLabel 384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3" style:display-name="ListLabel 383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2" style:display-name="ListLabel 382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1" style:display-name="ListLabel 381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0" style:display-name="ListLabel 38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9" style:display-name="ListLabel 37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8" style:display-name="ListLabel 37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7" style:display-name="ListLabel 37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6" style:display-name="ListLabel 37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5" style:display-name="ListLabel 37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4" style:display-name="ListLabel 37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3" style:display-name="ListLabel 37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2" style:display-name="ListLabel 37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1" style:display-name="ListLabel 37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0" style:display-name="ListLabel 37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9" style:display-name="ListLabel 36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8" style:display-name="ListLabel 36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7" style:display-name="ListLabel 36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6" style:display-name="ListLabel 36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5" style:display-name="ListLabel 36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4" style:display-name="ListLabel 36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3" style:display-name="ListLabel 36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2" style:display-name="ListLabel 36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1" style:display-name="ListLabel 36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0" style:display-name="ListLabel 36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9" style:display-name="ListLabel 35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8" style:display-name="ListLabel 35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7" style:display-name="ListLabel 35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6" style:display-name="ListLabel 35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5" style:display-name="ListLabel 35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4" style:display-name="ListLabel 35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3" style:display-name="ListLabel 35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2" style:display-name="ListLabel 35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1" style:display-name="ListLabel 35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0" style:display-name="ListLabel 35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9" style:display-name="ListLabel 34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8" style:display-name="ListLabel 34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7" style:display-name="ListLabel 34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6" style:display-name="ListLabel 34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5" style:display-name="ListLabel 34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4" style:display-name="ListLabel 34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3" style:display-name="ListLabel 34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2" style:display-name="ListLabel 34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1" style:display-name="ListLabel 34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0" style:display-name="ListLabel 34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9" style:display-name="ListLabel 33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8" style:display-name="ListLabel 33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7" style:display-name="ListLabel 33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6" style:display-name="ListLabel 33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5" style:display-name="ListLabel 33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4" style:display-name="ListLabel 33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3" style:display-name="ListLabel 333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2" style:display-name="ListLabel 33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1" style:display-name="ListLabel 331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0" style:display-name="ListLabel 330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9" style:display-name="ListLabel 329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8" style:display-name="ListLabel 328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7" style:display-name="ListLabel 327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6" style:display-name="ListLabel 326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5" style:display-name="ListLabel 32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4" style:display-name="ListLabel 32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3" style:display-name="ListLabel 32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2" style:display-name="ListLabel 32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1" style:display-name="ListLabel 32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0" style:display-name="ListLabel 32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9" style:display-name="ListLabel 31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8" style:display-name="ListLabel 31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7" style:display-name="ListLabel 31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6" style:display-name="ListLabel 31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5" style:display-name="ListLabel 31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4" style:display-name="ListLabel 31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3" style:display-name="ListLabel 31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2" style:display-name="ListLabel 31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1" style:display-name="ListLabel 3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0" style:display-name="ListLabel 31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9" style:display-name="ListLabel 30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8" style:display-name="ListLabel 30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7" style:display-name="ListLabel 30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6" style:display-name="ListLabel 30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5" style:display-name="ListLabel 30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4" style:display-name="ListLabel 30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3" style:display-name="ListLabel 30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2" style:display-name="ListLabel 30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1" style:display-name="ListLabel 30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0" style:display-name="ListLabel 30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9" style:display-name="ListLabel 29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8" style:display-name="ListLabel 29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7" style:display-name="ListLabel 29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6" style:display-name="ListLabel 29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5" style:display-name="ListLabel 29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4" style:display-name="ListLabel 29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3" style:display-name="ListLabel 29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2" style:display-name="ListLabel 29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1" style:display-name="ListLabel 29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0" style:display-name="ListLabel 29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9" style:display-name="ListLabel 28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8" style:display-name="ListLabel 28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7" style:display-name="ListLabel 28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6" style:display-name="ListLabel 28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5" style:display-name="ListLabel 28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4" style:display-name="ListLabel 28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3" style:display-name="ListLabel 28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2" style:display-name="ListLabel 28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1" style:display-name="ListLabel 28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0" style:display-name="ListLabel 28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9" style:display-name="ListLabel 279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8" style:display-name="ListLabel 278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7" style:display-name="ListLabel 277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6" style:display-name="ListLabel 276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5" style:display-name="ListLabel 275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4" style:display-name="ListLabel 274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3" style:display-name="ListLabel 273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2" style:display-name="ListLabel 27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1" style:display-name="ListLabel 27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0" style:display-name="ListLabel 27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9" style:display-name="ListLabel 26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8" style:display-name="ListLabel 26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7" style:display-name="ListLabel 26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6" style:display-name="ListLabel 26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5" style:display-name="ListLabel 26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4" style:display-name="ListLabel 26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3" style:display-name="ListLabel 26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2" style:display-name="ListLabel 26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1" style:display-name="ListLabel 26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0" style:display-name="ListLabel 26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9" style:display-name="ListLabel 25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8" style:display-name="ListLabel 25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7" style:display-name="ListLabel 25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6" style:display-name="ListLabel 25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5" style:display-name="ListLabel 25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4" style:display-name="ListLabel 25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3" style:display-name="ListLabel 25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2" style:display-name="ListLabel 25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1" style:display-name="ListLabel 25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0" style:display-name="ListLabel 25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9" style:display-name="ListLabel 24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8" style:display-name="ListLabel 24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7" style:display-name="ListLabel 24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6" style:display-name="ListLabel 24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5" style:display-name="ListLabel 24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4" style:display-name="ListLabel 24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3" style:display-name="ListLabel 24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2" style:display-name="ListLabel 24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1" style:display-name="ListLabel 24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0" style:display-name="ListLabel 24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9" style:display-name="ListLabel 23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8" style:display-name="ListLabel 23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7" style:display-name="ListLabel 23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6" style:display-name="ListLabel 23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5" style:display-name="ListLabel 23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4" style:display-name="ListLabel 23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3" style:display-name="ListLabel 23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2" style:display-name="ListLabel 23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1" style:display-name="ListLabel 23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0" style:display-name="ListLabel 23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9" style:display-name="ListLabel 22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8" style:display-name="ListLabel 22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7" style:display-name="ListLabel 22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6" style:display-name="ListLabel 22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5" style:display-name="ListLabel 22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4" style:display-name="ListLabel 22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3" style:display-name="ListLabel 22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2" style:display-name="ListLabel 22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1" style:display-name="ListLabel 22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0" style:display-name="ListLabel 22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9" style:display-name="ListLabel 21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8" style:display-name="ListLabel 21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7" style:display-name="ListLabel 21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6" style:display-name="ListLabel 21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5" style:display-name="ListLabel 21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4" style:display-name="ListLabel 21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3" style:display-name="ListLabel 21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2" style:display-name="ListLabel 21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1" style:display-name="ListLabel 2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0" style:display-name="ListLabel 21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9" style:display-name="ListLabel 20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8" style:display-name="ListLabel 20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7" style:display-name="ListLabel 20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6" style:display-name="ListLabel 20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5" style:display-name="ListLabel 20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4" style:display-name="ListLabel 20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3" style:display-name="ListLabel 20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2" style:display-name="ListLabel 20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1" style:display-name="ListLabel 20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0" style:display-name="ListLabel 20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9" style:display-name="ListLabel 19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8" style:display-name="ListLabel 19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7" style:display-name="ListLabel 19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6" style:display-name="ListLabel 19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5" style:display-name="ListLabel 19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4" style:display-name="ListLabel 19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3" style:display-name="ListLabel 19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2" style:display-name="ListLabel 19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1" style:display-name="ListLabel 19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0" style:display-name="ListLabel 19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9" style:display-name="ListLabel 18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8" style:display-name="ListLabel 18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7" style:display-name="ListLabel 18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6" style:display-name="ListLabel 18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5" style:display-name="ListLabel 18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4" style:display-name="ListLabel 18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3" style:display-name="ListLabel 18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2" style:display-name="ListLabel 18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1" style:display-name="ListLabel 18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0" style:display-name="ListLabel 18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9" style:display-name="ListLabel 17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8" style:display-name="ListLabel 17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7" style:display-name="ListLabel 17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6" style:display-name="ListLabel 17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5" style:display-name="ListLabel 17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4" style:display-name="ListLabel 17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3" style:display-name="ListLabel 17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2" style:display-name="ListLabel 17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1" style:display-name="ListLabel 17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0" style:display-name="ListLabel 17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9" style:display-name="ListLabel 16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8" style:display-name="ListLabel 16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7" style:display-name="ListLabel 16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6" style:display-name="ListLabel 16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5" style:display-name="ListLabel 16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4" style:display-name="ListLabel 16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3" style:display-name="ListLabel 16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2" style:display-name="ListLabel 16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1" style:display-name="ListLabel 16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0" style:display-name="ListLabel 16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9" style:display-name="ListLabel 15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8" style:display-name="ListLabel 15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7" style:display-name="ListLabel 15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6" style:display-name="ListLabel 15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5" style:display-name="ListLabel 15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4" style:display-name="ListLabel 15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3" style:display-name="ListLabel 153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2" style:display-name="ListLabel 15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1" style:display-name="ListLabel 151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0" style:display-name="ListLabel 150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9" style:display-name="ListLabel 149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8" style:display-name="ListLabel 148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7" style:display-name="ListLabel 147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6" style:display-name="ListLabel 146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5" style:display-name="ListLabel 14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4" style:display-name="ListLabel 14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3" style:display-name="ListLabel 14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2" style:display-name="ListLabel 14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1" style:display-name="ListLabel 14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0" style:display-name="ListLabel 14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9" style:display-name="ListLabel 13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8" style:display-name="ListLabel 13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7" style:display-name="ListLabel 13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6" style:display-name="ListLabel 136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5" style:display-name="ListLabel 13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4" style:display-name="ListLabel 13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3" style:display-name="ListLabel 13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2" style:display-name="ListLabel 13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1" style:display-name="ListLabel 13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0" style:display-name="ListLabel 13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9" style:display-name="ListLabel 12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8" style:display-name="ListLabel 12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7" style:display-name="ListLabel 12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6" style:display-name="ListLabel 12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5" style:display-name="ListLabel 12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4" style:display-name="ListLabel 12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3" style:display-name="ListLabel 12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2" style:display-name="ListLabel 12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1" style:display-name="ListLabel 12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0" style:display-name="ListLabel 12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9" style:display-name="ListLabel 11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8" style:display-name="ListLabel 11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7" style:display-name="ListLabel 11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6" style:display-name="ListLabel 11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5" style:display-name="ListLabel 11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4" style:display-name="ListLabel 11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3" style:display-name="ListLabel 11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2" style:display-name="ListLabel 11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1" style:display-name="ListLabel 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0" style:display-name="ListLabel 11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9" style:display-name="ListLabel 10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8" style:display-name="ListLabel 10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7" style:display-name="ListLabel 10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6" style:display-name="ListLabel 10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5" style:display-name="ListLabel 10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4" style:display-name="ListLabel 10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3" style:display-name="ListLabel 10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2" style:display-name="ListLabel 10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1" style:display-name="ListLabel 10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0" style:display-name="ListLabel 10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9" style:display-name="ListLabel 9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8" style:display-name="ListLabel 9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7" style:display-name="ListLabel 9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6" style:display-name="ListLabel 9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5" style:display-name="ListLabel 9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4" style:display-name="ListLabel 9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3" style:display-name="ListLabel 9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2" style:display-name="ListLabel 9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1" style:display-name="ListLabel 9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0" style:display-name="ListLabel 9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9" style:display-name="ListLabel 8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8" style:display-name="ListLabel 8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7" style:display-name="ListLabel 8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6" style:display-name="ListLabel 8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5" style:display-name="ListLabel 8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4" style:display-name="ListLabel 8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3" style:display-name="ListLabel 8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2" style:display-name="ListLabel 8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1" style:display-name="ListLabel 8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0" style:display-name="ListLabel 8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9" style:display-name="ListLabel 7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8" style:display-name="ListLabel 7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7" style:display-name="ListLabel 7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6" style:display-name="ListLabel 7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5" style:display-name="ListLabel 7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4" style:display-name="ListLabel 7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" style:display-name="ListLabel 7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" style:display-name="ListLabel 7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" style:display-name="ListLabel 7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" style:display-name="ListLabel 7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" style:display-name="ListLabel 6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" style:display-name="ListLabel 6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" style:display-name="ListLabel 6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" style:display-name="ListLabel 6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" style:display-name="ListLabel 6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" style:display-name="ListLabel 6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" style:display-name="ListLabel 6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" style:display-name="ListLabel 6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" style:display-name="ListLabel 6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" style:display-name="ListLabel 6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" style:display-name="ListLabel 5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" style:display-name="ListLabel 5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" style:display-name="ListLabel 5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" style:display-name="ListLabel 5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" style:display-name="ListLabel 5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" style:display-name="ListLabel 5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" style:display-name="ListLabel 5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" style:display-name="ListLabel 5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" style:display-name="ListLabel 5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" style:display-name="ListLabel 5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" style:display-name="ListLabel 4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" style:display-name="ListLabel 4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" style:display-name="ListLabel 4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" style:display-name="ListLabel 46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" style:display-name="ListLabel 4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" style:display-name="ListLabel 4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" style:display-name="ListLabel 4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" style:display-name="ListLabel 4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" style:display-name="ListLabel 4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" style:display-name="ListLabel 4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" style:display-name="ListLabel 3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" style:display-name="ListLabel 3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" style:display-name="ListLabel 3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" style:display-name="ListLabel 3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" style:display-name="ListLabel 3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" style:display-name="ListLabel 3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" style:display-name="ListLabel 3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" style:display-name="ListLabel 3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" style:display-name="ListLabel 3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" style:display-name="ListLabel 3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" style:display-name="ListLabel 2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" style:display-name="ListLabel 2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" style:display-name="ListLabel 2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" style:display-name="ListLabel 2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" style:display-name="ListLabel 2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" style:display-name="ListLabel 2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" style:display-name="ListLabel 2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" style:display-name="ListLabel 2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" style:display-name="ListLabel 2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" style:display-name="ListLabel 2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" style:display-name="ListLabel 1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non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" style:display-name="ListLabel 1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" style:display-name="ListLabel 1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" style:display-name="ListLabel 1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" style:display-name="ListLabel 1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" style:display-name="ListLabel 1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" style:display-name="ListLabel 1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" style:display-name="ListLabel 1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" style:display-name="ListLabel 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" style:display-name="ListLabel 1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2_20_Car" style:display-name="Título 2 Car" style:family="paragraph" style:default-outline-level="">
      <style:paragraph-properties fo:text-align="start" style:justify-single-word="false" fo:orphans="2" fo:widows="2" style:writing-mode="lr-tb"/>
      <style:text-properties fo:color="#262626" loext:opacity="100%" style:font-name="DejaVu Sans" fo:font-family="'DejaVu Sans'" style:font-family-generic="roman" style:font-pitch="variable" fo:font-size="12.5pt" fo:font-weight="bold" style:font-name-asian="DejaVu Sans1" style:font-family-asian="'DejaVu Sans'" style:font-family-generic-asian="system" style:font-pitch-asian="variable" style:font-size-asian="12.5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ie_20_de_20_página_20_Car" style:display-name="Pie de página Ca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cabezado_20_Car" style:display-name="Encabezado Ca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lace_20_de_20_Internet" style:display-name="Enlace de Internet" style:family="paragraph" style:default-outline-level="">
      <style:paragraph-properties fo:text-align="start" style:justify-single-word="false" fo:orphans="2" fo:widows="2" style:writing-mode="lr-tb"/>
      <style:text-properties fo:color="#0563c1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1_20_Car" style:display-name="Título 1 Car" style:family="paragraph" style:default-outline-level="">
      <style:paragraph-properties fo:text-align="start" style:justify-single-word="false" fo:orphans="2" fo:widows="2" style:writing-mode="lr-tb"/>
      <style:text-properties fo:color="#2f5496" loext:opacity="100%" style:font-name="Calibri Light" fo:font-family="'Calibri Light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Liberation Sans2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default-outline-level="" style:class="extra">
      <style:paragraph-properties fo:margin-top="0cm" fo:margin-bottom="0.497cm" style:contextual-spacing="false" fo:line-height="107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default-outline-level="" style:class="chapter">
      <style:paragraph-properties fo:margin-top="1.494cm" fo:margin-bottom="0.374cm" style:contextual-spacing="false" fo:line-height="107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36pt" fo:font-weight="bold" style:font-name-asian="DejaVu Sans1" style:font-family-asian="'DejaVu Sans'" style:font-family-generic-asian="system" style:font-pitch-asian="variable" style:font-size-asian="36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BJECT_7e_LT_7e_Gliederung_20_1" style:display-name="OBJECT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23T15:05:25.244872993</meta:creation-date>
    <dc:date>2025-12-01T08:43:33.929526500</dc:date>
    <meta:editing-duration>PT3H45M12S</meta:editing-duration>
    <meta:editing-cycles>21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28" meta:word-count="698" meta:character-count="4387" meta:non-whitespace-character-count="3716"/>
  </office:meta>
</office:document-meta>
</file>