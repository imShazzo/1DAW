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f5d1e" officeooo:paragraph-rsid="000f5d1e" style:font-weight-asian="bold" style:font-weight-complex="bold"/>
    </style:style>
    <style:style style:name="P2" style:family="paragraph" style:parent-style-name="Standard">
      <style:text-properties officeooo:rsid="0007f150" officeooo:paragraph-rsid="0007f150"/>
    </style:style>
    <style:style style:name="P3" style:family="paragraph" style:parent-style-name="Standard">
      <style:text-properties officeooo:rsid="00127705" officeooo:paragraph-rsid="00127705"/>
    </style:style>
    <style:style style:name="P4" style:family="paragraph" style:parent-style-name="Standard">
      <style:text-properties officeooo:rsid="0009dffc" officeooo:paragraph-rsid="0009dffc"/>
    </style:style>
    <style:style style:name="P5" style:family="paragraph" style:parent-style-name="Standard">
      <style:text-properties officeooo:rsid="000cffef" officeooo:paragraph-rsid="000cffef"/>
    </style:style>
    <style:style style:name="P6" style:family="paragraph" style:parent-style-name="Standard">
      <style:text-properties officeooo:rsid="000f5d1e" officeooo:paragraph-rsid="000f5d1e"/>
    </style:style>
    <style:style style:name="P7" style:family="paragraph" style:parent-style-name="Standard">
      <style:text-properties officeooo:rsid="0011081f" officeooo:paragraph-rsid="0011081f"/>
    </style:style>
    <style:style style:name="P8" style:family="paragraph" style:parent-style-name="Standard">
      <style:text-properties officeooo:rsid="0011081f" officeooo:paragraph-rsid="0012270c"/>
    </style:style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1"/>
    <style:style style:name="T1" style:family="text">
      <style:text-properties officeooo:rsid="000dba69"/>
    </style:style>
    <style:style style:name="T2" style:family="text">
      <style:text-properties officeooo:rsid="000a8d41"/>
    </style:style>
    <style:style style:name="T3" style:family="text">
      <style:text-properties officeooo:rsid="000b7d17"/>
    </style:style>
    <style:style style:name="T4" style:family="text">
      <style:text-properties officeooo:rsid="0012663b"/>
    </style:style>
    <style:style style:name="T5" style:family="text">
      <style:text-properties officeooo:rsid="0012270c"/>
    </style:style>
    <style:style style:name="T6" style:family="text">
      <style:text-properties officeooo:rsid="0011081f"/>
    </style:style>
    <text:list-style style:name="L1">
      <text:list-level-style-number text:level="1" text:style-name="Numbering_20_Symbols" loext:num-list-format="%1%)" style:num-suffix=")" style:num-format="a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AS ENTREGABLES TEMA 4</text:p>
      <text:p text:style-name="P2"/>
      <text:p text:style-name="P2"/>
      <text:p text:style-name="P2"><text:span text:style-name="T1">1. </text:span>¿Existe a día de hoy la IA fuerte? Reflexiona sobre ello.</text:p>
      <text:p text:style-name="P3">A dia de hoy la IA fuerte no existe,es un objetivo futuro en la investigacion.</text:p>
      <text:p text:style-name="P3"/>
      <text:p text:style-name="P4"><text:span text:style-name="T1">2. </text:span>Realiza un cronograma en Canva <text:span text:style-name="T2">sobre la historia o evolución </text:span><text:span text:style-name="T3">de </text:span>la IA. <text:span text:style-name="T4">Añade tu nombre y licencia CC al cronograma. Deberás entregar el enlace a dicho cronograma.</text:span></text:p>
      <text:p text:style-name="P4"><text:a xlink:type="simple" xlink:href="https://www.canva.com/design/DAHCx1BweXI/QFw5P9hh47n340CeH14xNQ/edit?utm_content=DAHCx1BweXI&amp;utm_campaign=designshare&amp;utm_medium=link2&amp;utm_source=sharebutton" text:style-name="Internet_20_link" text:visited-style-name="Visited_20_Internet_20_Link">https://www.canva.com/design/DAHCx1BweXI/QFw5P9hh47n340CeH14xNQ/edit?utm_content=DAHCx1BweXI&amp;utm_campaign=designshare&amp;utm_medium=link2&amp;utm_source=sharebutton</text:a></text:p>
      <text:p text:style-name="P4"/>
      <text:p text:style-name="P5"><text:span text:style-name="T1">3. </text:span>Explica como funcionaria una IA a la hora de reconocer un tipo de flor a partir de una foto en dos supuestos:</text:p>
      <text:p text:style-name="P5">a) con un modelo de aprendizaje automático</text:p>
      <text:p text:style-name="P5">b) con un modelo de aprendizaje profundo.</text:p>
      <text:p text:style-name="P5"/>
      <text:p text:style-name="P5">Haz algún tipo de imagen para explicar el proceso en cada caso. Puedes usar IA para crearlas.</text:p>
      <text:p text:style-name="P5"/>
      <text:p text:style-name="P6">4. Realiza un resumen sobre el artículo que aparece en el siguiente enlace:</text:p>
      <text:p text:style-name="P6"><text:a xlink:type="simple" xlink:href="https://www.larazon.es/emergente/destruira-empleos-pero-tambien-creara_20231215657c2b9229f3180001795650.html" text:style-name="Internet_20_link" text:visited-style-name="Visited_20_Internet_20_Link">https://www.larazon.es/emergente/destruira-empleos-pero-tambien-creara_20231215657c2b9229f3180001795650.html</text:a></text:p>
      <text:p text:style-name="P7">En <text:span text:style-name="T4">dicho resumen</text:span> debe aparecer: cómo afecta negativamente al mercado laboral, cuáles son los puestos mas afectados y cuáles menos, <text:span text:style-name="T5">qué nuevos puestos de trabajo </text:span><text:span text:style-name="T4">se van a necesitar </text:span><text:span text:style-name="T5">y </text:span><text:span text:style-name="T4">qué </text:span><text:span text:style-name="T5">nuevas funciones </text:span><text:span text:style-name="T4">se crearán</text:span><text:span text:style-name="T5">.</text:span></text:p>
      <text:p text:style-name="P6"/>
      <text:p text:style-name="P6">5. <text:span text:style-name="T6">La IA tiende a combinarse con diferentes THD (recuerda que las hemos estudiado en temas anteriores) para aprovechar al máximo las posibilidades que brinda. Haz una tabla con 3 columnas en la que aparezcan el nombre de la THD, una breve explicación sobre como se combina con la IA y un ejemplo.</text:span></text:p>
      <text:p text:style-name="P6"/>
      <text:p text:style-name="P8">6. <text:span text:style-name="T5">Sobre la IA y el desarrollo de software contesta a las siguientes preguntas:</text:span></text:p>
      <text:list text:style-name="L1">
        <text:list-item>
          <text:p text:style-name="P9">¿Cuáles son las principales herramientas de IA utilizadas en el desarrollo de software y qué funcionalidades ofrecen?</text:p>
        </text:list-item>
        <text:list-item>
          <text:p text:style-name="P9">¿Cómo afecta la IA a la productividad y eficiencia de los desarrolladores?</text:p>
        </text:list-item>
        <text:list-item>
          <text:p text:style-name="P9">¿Existen riesgos de que la IA reemplace a los desarrolladores en ciertas áreas? Justifica tu respuesta.</text:p>
        </text:list-item>
        <text:list-item>
          <text:p text:style-name="P9">¿Qué habilidades deberían desarrollar los programadores para adaptarse a un entorno cada vez más influenciado por la IA?</text:p>
        </text:list-item>
        <text:list-item>
          <text:p text:style-name="P10">¿Cómo podría la IA cambiar el futuro del desarrollo de software en los próximos 5-10 años?</text:p>
        </text:list-item>
      </text:list>
      <text:p text:style-name="P8"><text:s/></text:p>
      <text:p text:style-name="P5"/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8T18:21:32.365028186</meta:creation-date>
    <dc:date>2026-03-02T09:21:21.431521900</dc:date>
    <meta:editing-duration>PT1H13M4S</meta:editing-duration>
    <meta:editing-cycles>10</meta:editing-cycles>
    <meta:generator>LibreOffice/25.8.1.1$Windows_X86_64 LibreOffice_project/54047653041915e595ad4e45cccea684809c77b5</meta:generator>
    <meta:document-statistic meta:table-count="0" meta:image-count="0" meta:object-count="0" meta:page-count="1" meta:paragraph-count="20" meta:word-count="315" meta:character-count="2060" meta:non-whitespace-character-count="1768"/>
  </office:meta>
</office:document-meta>
</file>